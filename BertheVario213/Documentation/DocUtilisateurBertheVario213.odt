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C000002AA0AC9E4D4.png" manifest:media-type="image/png"/>
  <manifest:file-entry manifest:full-path="Pictures/10000000000002D8000000D73A72951C.png" manifest:media-type="image/png"/>
  <manifest:file-entry manifest:full-path="Pictures/1000000000000154000001C6A9899495.png" manifest:media-type="image/png"/>
  <manifest:file-entry manifest:full-path="Pictures/1000000000000298000001C8F01ED3A7.png" manifest:media-type="image/png"/>
  <manifest:file-entry manifest:full-path="Pictures/1000000000000280000001040143C888.png" manifest:media-type="image/png"/>
  <manifest:file-entry manifest:full-path="Pictures/1000000000000155000001C848DAAF99.png" manifest:media-type="image/png"/>
  <manifest:file-entry manifest:full-path="Pictures/10000000000001900000011761FA1335.png" manifest:media-type="image/png"/>
  <manifest:file-entry manifest:full-path="Pictures/100000000000018100000202BA51F32F.png" manifest:media-type="image/png"/>
  <manifest:file-entry manifest:full-path="Pictures/1000000000000142000001C1D7E252D3.png" manifest:media-type="image/png"/>
  <manifest:file-entry manifest:full-path="Pictures/100000000000015A000001CD6D22A8A4.png" manifest:media-type="image/png"/>
  <manifest:file-entry manifest:full-path="Pictures/10000000000001E400000287CFF58636.png" manifest:media-type="image/png"/>
  <manifest:file-entry manifest:full-path="Pictures/1000000000000298000001B5D0ED245D.png" manifest:media-type="image/png"/>
  <manifest:file-entry manifest:full-path="Pictures/100000010000081C000002CA8BC65E0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2"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3" style:family="paragraph" style:parent-style-name="Standard">
      <style:paragraph-properties fo:text-align="center" style:justify-single-word="false"/>
      <style:text-properties fo:font-size="14pt" fo:language="fr" fo:country="FR" style:text-underline-style="none" officeooo:rsid="00116a63" officeooo:paragraph-rsid="0253cc8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none" officeooo:rsid="00105800" officeooo:paragraph-rsid="0253cc83" style:font-size-asian="14pt" style:font-size-complex="14pt"/>
    </style:style>
    <style:style style:name="P5" style:family="paragraph" style:parent-style-name="Standard">
      <style:paragraph-properties fo:text-align="center" style:justify-single-word="false"/>
      <style:text-properties officeooo:paragraph-rsid="0253cc83"/>
    </style:style>
    <style:style style:name="P6" style:family="paragraph" style:parent-style-name="Standard">
      <style:paragraph-properties fo:text-align="center" style:justify-single-word="false"/>
      <style:text-properties fo:font-size="14pt" fo:language="fr" fo:country="FR" style:text-underline-style="none" fo:font-weight="bold" officeooo:rsid="0053e919" officeooo:paragraph-rsid="0253cc83" style:font-size-asian="14pt" style:font-weight-asian="bold" style:font-size-complex="14pt" style:font-weight-complex="bold"/>
    </style:style>
    <style:style style:name="P7"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253cc83" style:font-size-asian="14pt" style:font-weight-asian="normal" style:font-size-complex="14pt" style:font-weight-complex="normal"/>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253cc83"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371d4" officeooo:paragraph-rsid="0253cc83"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253cc83"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officeooo:rsid="0033ca9f" officeooo:paragraph-rsid="0253cc83" style:font-size-asian="14pt" style:font-size-complex="14pt"/>
    </style:style>
    <style:style style:name="P12" style:family="paragraph" style:parent-style-name="Standard">
      <style:paragraph-properties fo:text-align="center" style:justify-single-word="false"/>
      <style:text-properties fo:font-size="14pt" fo:language="fr" fo:country="FR" style:text-underline-style="none" officeooo:rsid="001d2e18" officeooo:paragraph-rsid="0253cc83" style:font-size-asian="14pt" style:font-size-complex="14pt"/>
    </style:style>
    <style:style style:name="P13" style:family="paragraph" style:parent-style-name="Standard">
      <style:paragraph-properties fo:text-align="center" style:justify-single-word="false"/>
      <style:text-properties fo:font-size="14pt" fo:language="fr" fo:country="FR" style:text-underline-style="none" officeooo:rsid="005a4c91" officeooo:paragraph-rsid="0253cc83" style:font-size-asian="14pt" style:font-size-complex="14pt"/>
    </style:style>
    <style:style style:name="P14" style:family="paragraph" style:parent-style-name="Contents_20_Heading">
      <style:paragraph-properties fo:break-before="page"/>
    </style:style>
    <style:style style:name="P15" style:family="paragraph" style:parent-style-name="Contents_20_1">
      <style:paragraph-properties>
        <style:tab-stops>
          <style:tab-stop style:position="17.588cm" style:type="right" style:leader-style="dotted" style:leader-text="."/>
        </style:tab-stops>
      </style:paragraph-properties>
    </style:style>
    <style:style style:name="P16"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17"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18" style:family="paragraph" style:parent-style-name="Text_20_body">
      <style:text-properties fo:language="fr" fo:country="FR" officeooo:rsid="026228f2" officeooo:paragraph-rsid="02689273"/>
    </style:style>
    <style:style style:name="P19" style:family="paragraph" style:parent-style-name="Text_20_body">
      <style:text-properties fo:language="fr" fo:country="FR" officeooo:rsid="026228f2" officeooo:paragraph-rsid="026228f2"/>
    </style:style>
    <style:style style:name="P20" style:family="paragraph" style:parent-style-name="Text_20_body">
      <style:text-properties fo:language="fr" fo:country="FR" officeooo:rsid="015973c0" officeooo:paragraph-rsid="025cb355"/>
    </style:style>
    <style:style style:name="P21" style:family="paragraph" style:parent-style-name="Text_20_body">
      <style:text-properties fo:language="fr" fo:country="FR" officeooo:rsid="0158a30e" officeooo:paragraph-rsid="025216b6"/>
    </style:style>
    <style:style style:name="P22" style:family="paragraph" style:parent-style-name="Heading_20_1">
      <style:paragraph-properties fo:break-before="page"/>
      <style:text-properties fo:language="fr" fo:country="FR"/>
    </style:style>
    <style:style style:name="P23" style:family="paragraph" style:parent-style-name="Text_20_body">
      <style:text-properties fo:language="fr" fo:country="FR" officeooo:rsid="0012d332" officeooo:paragraph-rsid="0012d332"/>
    </style:style>
    <style:style style:name="P24" style:family="paragraph" style:parent-style-name="Text_20_body">
      <style:text-properties officeooo:rsid="0012d332" officeooo:paragraph-rsid="0012d332"/>
    </style:style>
    <style:style style:name="P25" style:family="paragraph" style:parent-style-name="Text_20_body">
      <style:text-properties fo:language="fr" fo:country="FR" style:text-underline-style="solid" style:text-underline-width="auto" style:text-underline-color="font-color" officeooo:rsid="0012d332" officeooo:paragraph-rsid="0012d332"/>
    </style:style>
    <style:style style:name="P26" style:family="paragraph" style:parent-style-name="Text_20_body">
      <style:text-properties fo:language="fr" fo:country="FR" officeooo:rsid="00e303f7" officeooo:paragraph-rsid="00e303f7"/>
    </style:style>
    <style:style style:name="P27" style:family="paragraph" style:parent-style-name="Text_20_body">
      <style:text-properties fo:language="fr" fo:country="FR" style:text-underline-style="solid" style:text-underline-width="auto" style:text-underline-color="font-color" fo:font-weight="bold" officeooo:rsid="01f30051" officeooo:paragraph-rsid="01f30051" style:font-weight-asian="bold" style:font-weight-complex="bold"/>
    </style:style>
    <style:style style:name="P28" style:family="paragraph" style:parent-style-name="Text_20_body">
      <style:text-properties fo:language="fr" fo:country="FR" style:text-underline-style="none" fo:font-weight="normal" officeooo:rsid="01f30051" officeooo:paragraph-rsid="01f30051" style:font-weight-asian="normal" style:font-weight-complex="normal"/>
    </style:style>
    <style:style style:name="P29" style:family="paragraph" style:parent-style-name="Heading_20_1">
      <style:text-properties fo:language="fr" fo:country="FR" officeooo:rsid="0012d332" officeooo:paragraph-rsid="0012d332"/>
    </style:style>
    <style:style style:name="P30" style:family="paragraph" style:parent-style-name="Text_20_body">
      <style:text-properties fo:language="fr" fo:country="FR" officeooo:rsid="00136237" officeooo:paragraph-rsid="00136237"/>
    </style:style>
    <style:style style:name="P31" style:family="paragraph" style:parent-style-name="Text_20_body">
      <style:text-properties fo:language="fr" fo:country="FR"/>
    </style:style>
    <style:style style:name="P32" style:family="paragraph">
      <loext:graphic-properties draw:fill="none" draw:fill-color="#ffffff"/>
      <style:text-properties fo:font-size="15pt" style:font-size-asian="15pt" style:font-size-complex="15pt"/>
    </style:style>
    <style:style style:name="P33" style:family="paragraph">
      <style:paragraph-properties fo:text-align="center"/>
      <style:text-properties fo:font-size="12pt"/>
    </style:style>
    <style:style style:name="P34" style:family="paragraph">
      <style:paragraph-properties fo:text-align="center"/>
    </style:style>
    <style:style style:name="P35" style:family="paragraph">
      <loext:graphic-properties draw:fill-color="#000000"/>
      <style:paragraph-properties fo:text-align="center"/>
    </style:style>
    <style:style style:name="P36" style:family="paragraph" style:parent-style-name="Text_20_body">
      <style:text-properties fo:language="fr" fo:country="FR" officeooo:paragraph-rsid="01ef7eb7"/>
    </style:style>
    <style:style style:name="P37" style:family="paragraph" style:parent-style-name="Text_20_body">
      <style:text-properties fo:language="fr" fo:country="FR" style:text-underline-style="none" fo:font-weight="normal" officeooo:rsid="01f30051" officeooo:paragraph-rsid="020366a8" style:font-weight-asian="normal" style:font-weight-complex="normal"/>
    </style:style>
    <style:style style:name="P38" style:family="paragraph" style:parent-style-name="Text_20_body">
      <style:text-properties fo:language="fr" fo:country="FR" style:text-underline-style="none" fo:font-weight="normal" officeooo:rsid="01f30051" officeooo:paragraph-rsid="022b16b4" style:font-weight-asian="normal" style:font-weight-complex="normal"/>
    </style:style>
    <style:style style:name="P39" style:family="paragraph" style:parent-style-name="Text_20_body">
      <style:text-properties fo:language="fr" fo:country="FR" style:text-underline-style="none" fo:font-weight="normal" officeooo:rsid="01f30051" officeooo:paragraph-rsid="01f48bee" style:font-weight-asian="normal" style:font-weight-complex="normal"/>
    </style:style>
    <style:style style:name="P40" style:family="paragraph" style:parent-style-name="Text_20_body">
      <style:paragraph-properties fo:break-before="page"/>
      <style:text-properties fo:language="fr" fo:country="FR" officeooo:paragraph-rsid="0015f378"/>
    </style:style>
    <style:style style:name="P41" style:family="paragraph" style:parent-style-name="Text_20_body">
      <style:text-properties fo:language="fr" fo:country="FR" officeooo:rsid="0015f378" officeooo:paragraph-rsid="0015f378"/>
    </style:style>
    <style:style style:name="P42" style:family="paragraph" style:parent-style-name="Text_20_body">
      <style:text-properties fo:language="fr" fo:country="FR" officeooo:rsid="002cfb44" officeooo:paragraph-rsid="02576a0d"/>
    </style:style>
    <style:style style:name="P43" style:family="paragraph" style:parent-style-name="Text_20_body">
      <style:text-properties fo:language="fr" fo:country="FR" officeooo:rsid="0015f378" officeooo:paragraph-rsid="00d725f0"/>
    </style:style>
    <style:style style:name="P44" style:family="paragraph" style:parent-style-name="Text_20_body">
      <style:text-properties fo:language="fr" fo:country="FR" officeooo:rsid="001603fd" officeooo:paragraph-rsid="001603fd"/>
    </style:style>
    <style:style style:name="P45" style:family="paragraph" style:parent-style-name="Text_20_body">
      <style:text-properties fo:language="fr" fo:country="FR" officeooo:rsid="001603fd" officeooo:paragraph-rsid="00f5f665"/>
    </style:style>
    <style:style style:name="P46" style:family="paragraph" style:parent-style-name="Text_20_body">
      <style:text-properties fo:language="fr" fo:country="FR" officeooo:rsid="001603fd" officeooo:paragraph-rsid="00317f05"/>
    </style:style>
    <style:style style:name="P47" style:family="paragraph" style:parent-style-name="Text_20_body">
      <style:text-properties fo:language="fr" fo:country="FR" officeooo:rsid="001603fd" officeooo:paragraph-rsid="01ccc771"/>
    </style:style>
    <style:style style:name="P48" style:family="paragraph" style:parent-style-name="Text_20_body">
      <style:text-properties fo:language="fr" fo:country="FR" officeooo:rsid="001603fd" officeooo:paragraph-rsid="01cee272"/>
    </style:style>
    <style:style style:name="P49" style:family="paragraph" style:parent-style-name="Text_20_body">
      <style:text-properties fo:language="fr" fo:country="FR" officeooo:rsid="002cfb44" officeooo:paragraph-rsid="002cfb44"/>
    </style:style>
    <style:style style:name="P50" style:family="paragraph" style:parent-style-name="Text_20_body">
      <style:text-properties fo:language="fr" fo:country="FR" officeooo:rsid="0044bf4f" officeooo:paragraph-rsid="0044bf4f"/>
    </style:style>
    <style:style style:name="P51" style:family="paragraph" style:parent-style-name="Text_20_body">
      <style:text-properties fo:language="fr" fo:country="FR" officeooo:rsid="007ea6f6" officeooo:paragraph-rsid="007ea6f6"/>
    </style:style>
    <style:style style:name="P52" style:family="paragraph" style:parent-style-name="Text_20_body">
      <style:text-properties fo:language="fr" fo:country="FR" officeooo:rsid="001603fd" officeooo:paragraph-rsid="012e0816"/>
    </style:style>
    <style:style style:name="P53" style:family="paragraph" style:parent-style-name="Heading_20_1">
      <style:text-properties fo:language="fr" fo:country="FR" officeooo:paragraph-rsid="007b607e"/>
    </style:style>
    <style:style style:name="P54" style:family="paragraph" style:parent-style-name="Text_20_body">
      <style:text-properties fo:language="fr" fo:country="FR" officeooo:rsid="0014bfe8" officeooo:paragraph-rsid="0014bfe8"/>
    </style:style>
    <style:style style:name="P55" style:family="paragraph" style:parent-style-name="Text_20_body">
      <style:text-properties fo:language="fr" fo:country="FR" officeooo:rsid="002670f6" officeooo:paragraph-rsid="0014bfe8"/>
    </style:style>
    <style:style style:name="P56" style:family="paragraph" style:parent-style-name="Text_20_body">
      <style:text-properties fo:language="fr" fo:country="FR" officeooo:rsid="00362c84" officeooo:paragraph-rsid="00362c84"/>
    </style:style>
    <style:style style:name="P57" style:family="paragraph" style:parent-style-name="Text_20_body">
      <style:text-properties fo:language="fr" fo:country="FR" style:text-underline-style="solid" style:text-underline-width="auto" style:text-underline-color="font-color" fo:font-weight="bold" officeooo:rsid="01f30051" officeooo:paragraph-rsid="020bd592" style:font-weight-asian="bold" style:font-weight-complex="bold"/>
    </style:style>
    <style:style style:name="P58" style:family="paragraph" style:parent-style-name="Text_20_body">
      <style:text-properties fo:language="fr" fo:country="FR" style:text-underline-style="none" fo:font-weight="normal" officeooo:rsid="01f30051" officeooo:paragraph-rsid="020bd592" style:font-weight-asian="normal" style:font-weight-complex="normal"/>
    </style:style>
    <style:style style:name="P59"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60" style:family="paragraph" style:parent-style-name="Heading_20_1">
      <style:text-properties fo:language="fr" fo:country="FR" officeooo:paragraph-rsid="0113e5e4"/>
    </style:style>
    <style:style style:name="P61" style:family="paragraph" style:parent-style-name="Text_20_body">
      <style:text-properties fo:language="fr" fo:country="FR" officeooo:rsid="0050e736" officeooo:paragraph-rsid="0113e5e4"/>
    </style:style>
    <style:style style:name="P62" style:family="paragraph" style:parent-style-name="Text_20_body">
      <style:text-properties fo:language="fr" fo:country="FR" style:text-underline-style="solid" style:text-underline-width="auto" style:text-underline-color="font-color" fo:font-weight="bold" officeooo:rsid="01f30051" officeooo:paragraph-rsid="020c052b" style:font-weight-asian="bold" style:font-weight-complex="bold"/>
    </style:style>
    <style:style style:name="P63" style:family="paragraph" style:parent-style-name="Text_20_body">
      <style:text-properties fo:language="fr" fo:country="FR" style:text-underline-style="none" fo:font-weight="normal" officeooo:rsid="01f30051" officeooo:paragraph-rsid="022620ea" style:font-weight-asian="normal" style:font-weight-complex="normal"/>
    </style:style>
    <style:style style:name="P64" style:family="paragraph" style:parent-style-name="Text_20_body">
      <style:text-properties fo:language="fr" fo:country="FR" style:text-underline-style="none" fo:font-weight="normal" officeooo:rsid="01f30051" officeooo:paragraph-rsid="020c052b" style:font-weight-asian="normal" style:font-weight-complex="normal"/>
    </style:style>
    <style:style style:name="P65" style:family="paragraph" style:parent-style-name="Text_20_body">
      <style:text-properties fo:language="fr" fo:country="FR" officeooo:rsid="01f30051" officeooo:paragraph-rsid="020c052b"/>
    </style:style>
    <style:style style:name="P66" style:family="paragraph" style:parent-style-name="Text_20_body">
      <style:paragraph-properties fo:break-before="page"/>
      <style:text-properties fo:language="fr" fo:country="FR" officeooo:rsid="0050e736" officeooo:paragraph-rsid="0113e5e4"/>
    </style:style>
    <style:style style:name="P67" style:family="paragraph" style:parent-style-name="Heading_20_1">
      <style:text-properties fo:language="fr" fo:country="FR" officeooo:paragraph-rsid="0050e736"/>
    </style:style>
    <style:style style:name="P68" style:family="paragraph" style:parent-style-name="Text_20_body">
      <style:text-properties fo:language="fr" fo:country="FR" officeooo:rsid="0014bfe8" officeooo:paragraph-rsid="0050e736"/>
    </style:style>
    <style:style style:name="P69" style:family="paragraph" style:parent-style-name="Text_20_body">
      <style:text-properties fo:language="fr" fo:country="FR" officeooo:rsid="0050e736" officeooo:paragraph-rsid="0127cfb5"/>
    </style:style>
    <style:style style:name="P70" style:family="paragraph" style:parent-style-name="Text_20_body">
      <style:text-properties fo:language="fr" fo:country="FR" officeooo:rsid="0050e736" officeooo:paragraph-rsid="0050e736"/>
    </style:style>
    <style:style style:name="P71" style:family="paragraph" style:parent-style-name="Text_20_body">
      <style:text-properties fo:language="fr" fo:country="FR" style:text-underline-style="none" fo:font-weight="normal" officeooo:rsid="02076d23" officeooo:paragraph-rsid="020c052b" style:font-weight-asian="normal" style:font-weight-complex="normal"/>
    </style:style>
    <style:style style:name="P72" style:family="paragraph" style:parent-style-name="Text_20_body">
      <style:text-properties fo:language="fr" fo:country="FR" style:text-underline-style="none" fo:font-weight="normal" officeooo:rsid="02076d23" officeooo:paragraph-rsid="02076d23" style:font-weight-asian="normal" style:font-weight-complex="normal"/>
    </style:style>
    <style:style style:name="P73" style:family="paragraph" style:parent-style-name="Text_20_body">
      <style:text-properties fo:language="fr" fo:country="FR" fo:font-style="normal" officeooo:rsid="0050e736" officeooo:paragraph-rsid="0050e736" style:font-style-asian="normal" style:font-style-complex="normal"/>
    </style:style>
    <style:style style:name="P74" style:family="paragraph" style:parent-style-name="Text_20_body">
      <style:text-properties fo:language="fr" fo:country="FR" fo:font-style="normal" officeooo:rsid="00529221" officeooo:paragraph-rsid="00529221" style:font-style-asian="normal" style:font-style-complex="normal"/>
    </style:style>
    <style:style style:name="P75"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76"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77" style:family="paragraph" style:parent-style-name="Text_20_body">
      <style:text-properties fo:language="fr" fo:country="FR" officeooo:rsid="00529221" officeooo:paragraph-rsid="00529221"/>
    </style:style>
    <style:style style:name="P78"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79" style:family="paragraph" style:parent-style-name="Heading_20_1">
      <style:text-properties fo:language="fr" fo:country="FR" officeooo:paragraph-rsid="0128b585"/>
    </style:style>
    <style:style style:name="P80" style:family="paragraph" style:parent-style-name="Text_20_body">
      <style:text-properties fo:language="fr" fo:country="FR" officeooo:rsid="0014bfe8" officeooo:paragraph-rsid="02663779"/>
    </style:style>
    <style:style style:name="P81" style:family="paragraph" style:parent-style-name="Text_20_body">
      <style:text-properties fo:language="fr" fo:country="FR" style:text-underline-style="solid" style:text-underline-width="auto" style:text-underline-color="font-color" fo:font-weight="bold" officeooo:rsid="01f30051" officeooo:paragraph-rsid="02663779" style:font-weight-asian="bold" style:font-weight-complex="bold"/>
    </style:style>
    <style:style style:name="P82" style:family="paragraph" style:parent-style-name="Heading_20_1">
      <style:text-properties fo:language="fr" fo:country="FR" officeooo:paragraph-rsid="012d4933"/>
    </style:style>
    <style:style style:name="P83" style:family="paragraph" style:parent-style-name="Text_20_body">
      <style:text-properties fo:language="fr" fo:country="FR" officeooo:rsid="0014bfe8" officeooo:paragraph-rsid="012d4933"/>
    </style:style>
    <style:style style:name="P84" style:family="paragraph" style:parent-style-name="Text_20_body">
      <style:paragraph-properties fo:break-before="page"/>
      <style:text-properties fo:language="fr" fo:country="FR" style:text-underline-style="none" fo:font-weight="normal" officeooo:rsid="01d18a44" officeooo:paragraph-rsid="01d18a44" style:font-weight-asian="normal" style:font-weight-complex="normal"/>
    </style:style>
    <style:style style:name="P85" style:family="paragraph" style:parent-style-name="Text_20_body">
      <style:text-properties fo:language="fr" fo:country="FR" officeooo:rsid="0014bfe8" officeooo:paragraph-rsid="00362c84"/>
    </style:style>
    <style:style style:name="P86" style:family="paragraph" style:parent-style-name="Text_20_body">
      <style:text-properties fo:language="fr" fo:country="FR" officeooo:rsid="01f30051" officeooo:paragraph-rsid="020f5666"/>
    </style:style>
    <style:style style:name="P87" style:family="paragraph" style:parent-style-name="Text_20_body">
      <style:text-properties fo:language="fr" fo:country="FR" style:text-underline-style="none" fo:font-weight="normal" officeooo:rsid="01f30051" officeooo:paragraph-rsid="020f5666" style:font-weight-asian="normal" style:font-weight-complex="normal"/>
    </style:style>
    <style:style style:name="P88" style:family="paragraph" style:parent-style-name="Heading_20_1">
      <style:text-properties fo:language="fr" fo:country="FR" officeooo:paragraph-rsid="002670f6"/>
    </style:style>
    <style:style style:name="P89" style:family="paragraph" style:parent-style-name="Text_20_body">
      <style:text-properties fo:language="fr" fo:country="FR" officeooo:rsid="0014bfe8" officeooo:paragraph-rsid="00cb816d"/>
    </style:style>
    <style:style style:name="P90" style:family="paragraph" style:parent-style-name="Text_20_body">
      <style:text-properties fo:language="fr" fo:country="FR" officeooo:rsid="00cb816d" officeooo:paragraph-rsid="00cb816d"/>
    </style:style>
    <style:style style:name="P91" style:family="paragraph" style:parent-style-name="Text_20_body">
      <style:text-properties fo:language="fr" fo:country="FR" officeooo:rsid="001d2e18" officeooo:paragraph-rsid="00b4c9a6"/>
    </style:style>
    <style:style style:name="P92" style:family="paragraph" style:parent-style-name="Text_20_body">
      <style:text-properties fo:language="fr" fo:country="FR" officeooo:rsid="001d2e18" officeooo:paragraph-rsid="01c45708"/>
    </style:style>
    <style:style style:name="P93" style:family="paragraph" style:parent-style-name="Text_20_body">
      <style:text-properties fo:language="fr" fo:country="FR" officeooo:rsid="015c6fd1" officeooo:paragraph-rsid="016fdcbf"/>
    </style:style>
    <style:style style:name="P94" style:family="paragraph" style:parent-style-name="Text_20_body">
      <style:text-properties fo:language="fr" fo:country="FR" officeooo:rsid="001d2e18" officeooo:paragraph-rsid="016fdcbf"/>
    </style:style>
    <style:style style:name="P95" style:family="paragraph" style:parent-style-name="Text_20_body">
      <style:text-properties fo:language="fr" fo:country="FR" officeooo:rsid="001d2e18" officeooo:paragraph-rsid="001d2e18"/>
    </style:style>
    <style:style style:name="P96" style:family="paragraph" style:parent-style-name="Text_20_body">
      <style:text-properties fo:language="fr" fo:country="FR" officeooo:rsid="001d2e18" officeooo:paragraph-rsid="01009302"/>
    </style:style>
    <style:style style:name="P97" style:family="paragraph" style:parent-style-name="Text_20_body">
      <style:text-properties officeooo:paragraph-rsid="02667bb6"/>
    </style:style>
    <style:style style:name="P98" style:family="paragraph" style:parent-style-name="Text_20_body">
      <style:text-properties officeooo:paragraph-rsid="01c0cb79"/>
    </style:style>
    <style:style style:name="P99" style:family="paragraph" style:parent-style-name="Text_20_body">
      <style:text-properties fo:language="fr" fo:country="FR" officeooo:rsid="003aa0c3" officeooo:paragraph-rsid="00b5740c"/>
    </style:style>
    <style:style style:name="P100" style:family="paragraph" style:parent-style-name="Text_20_body">
      <style:text-properties fo:language="fr" fo:country="FR" officeooo:rsid="001d2e18" officeooo:paragraph-rsid="01a66b45"/>
    </style:style>
    <style:style style:name="P101" style:family="paragraph" style:parent-style-name="Text_20_body">
      <style:text-properties fo:language="fr" fo:country="FR" officeooo:rsid="001d2e18" officeooo:paragraph-rsid="01a7ce10"/>
    </style:style>
    <style:style style:name="P102" style:family="paragraph" style:parent-style-name="Text_20_body">
      <style:text-properties fo:language="fr" fo:country="FR" officeooo:rsid="003aa0c3" officeooo:paragraph-rsid="00b4c9a6"/>
    </style:style>
    <style:style style:name="P103" style:family="paragraph" style:parent-style-name="Text_20_body">
      <style:text-properties fo:language="fr" fo:country="FR" officeooo:rsid="0085ba02" officeooo:paragraph-rsid="0085ba02"/>
    </style:style>
    <style:style style:name="P104" style:family="paragraph" style:parent-style-name="Text_20_body">
      <style:text-properties fo:language="fr" fo:country="FR" officeooo:rsid="002d2798" officeooo:paragraph-rsid="002d2798"/>
    </style:style>
    <style:style style:name="P105" style:family="paragraph" style:parent-style-name="Text_20_body">
      <style:text-properties fo:language="fr" fo:country="FR" officeooo:rsid="02667bb6" officeooo:paragraph-rsid="02667bb6"/>
    </style:style>
    <style:style style:name="P106" style:family="paragraph" style:parent-style-name="Heading_20_1">
      <style:paragraph-properties fo:break-before="page"/>
      <style:text-properties fo:language="fr" fo:country="FR" officeooo:rsid="0018e5d8" officeooo:paragraph-rsid="002d2798"/>
    </style:style>
    <style:style style:name="P107" style:family="paragraph" style:parent-style-name="Text_20_body">
      <style:text-properties fo:language="fr" fo:country="FR" officeooo:rsid="002d2798" officeooo:paragraph-rsid="003c163e"/>
    </style:style>
    <style:style style:name="P108" style:family="paragraph" style:parent-style-name="Text_20_body">
      <style:text-properties fo:language="fr" fo:country="FR" officeooo:rsid="001d2e18" officeooo:paragraph-rsid="003c163e"/>
    </style:style>
    <style:style style:name="P109" style:family="paragraph" style:parent-style-name="Heading_20_1">
      <style:text-properties fo:language="fr" fo:country="FR" officeooo:rsid="0018e5d8" officeooo:paragraph-rsid="0018e5d8"/>
    </style:style>
    <style:style style:name="P110" style:family="paragraph" style:parent-style-name="Text_20_body">
      <style:text-properties officeooo:paragraph-rsid="0018e5d8"/>
    </style:style>
    <style:style style:name="P111" style:family="paragraph" style:parent-style-name="Text_20_body">
      <style:text-properties fo:language="fr" fo:country="FR" officeooo:rsid="0018e5d8" officeooo:paragraph-rsid="0018e5d8"/>
    </style:style>
    <style:style style:name="P112" style:family="paragraph" style:parent-style-name="Heading_20_1">
      <style:text-properties fo:language="fr" fo:country="FR" officeooo:rsid="0018e5d8" officeooo:paragraph-rsid="00300d48"/>
    </style:style>
    <style:style style:name="P113" style:family="paragraph" style:parent-style-name="Text_20_body">
      <style:text-properties fo:language="fr" fo:country="FR" officeooo:rsid="00300d48" officeooo:paragraph-rsid="0056e984"/>
    </style:style>
    <style:style style:name="P114" style:family="paragraph" style:parent-style-name="Text_20_body">
      <style:text-properties fo:language="fr" fo:country="FR" officeooo:rsid="00a3b987" officeooo:paragraph-rsid="00a3b987"/>
    </style:style>
    <style:style style:name="P115" style:family="paragraph" style:parent-style-name="Text_20_body">
      <style:text-properties officeooo:paragraph-rsid="00a4c5bf"/>
    </style:style>
    <style:style style:name="P116"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17" style:family="paragraph" style:parent-style-name="Text_20_body">
      <style:text-properties fo:language="fr" fo:country="FR" officeooo:rsid="00300d48" officeooo:paragraph-rsid="00300d48"/>
    </style:style>
    <style:style style:name="P118" style:family="paragraph" style:parent-style-name="Heading_20_1">
      <style:text-properties fo:language="fr" fo:country="FR" officeooo:rsid="0018e5d8" officeooo:paragraph-rsid="003f2cdf"/>
    </style:style>
    <style:style style:name="P119" style:family="paragraph" style:parent-style-name="Text_20_body">
      <style:text-properties fo:language="fr" fo:country="FR" officeooo:rsid="003f2cdf" officeooo:paragraph-rsid="003f2cdf"/>
    </style:style>
    <style:style style:name="P120" style:family="paragraph" style:parent-style-name="Text_20_body">
      <style:text-properties officeooo:paragraph-rsid="018cb4f3"/>
    </style:style>
    <style:style style:name="P121" style:family="paragraph" style:parent-style-name="Text_20_body">
      <style:text-properties fo:language="fr" fo:country="FR" officeooo:paragraph-rsid="018edea0"/>
    </style:style>
    <style:style style:name="P122" style:family="paragraph" style:parent-style-name="Text_20_body">
      <style:text-properties fo:language="fr" fo:country="FR" officeooo:paragraph-rsid="003f2cdf"/>
    </style:style>
    <style:style style:name="P123"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124"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125"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26"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27" style:family="paragraph" style:parent-style-name="Text_20_body">
      <style:text-properties fo:language="fr" fo:country="FR" officeooo:paragraph-rsid="00710b8f"/>
    </style:style>
    <style:style style:name="P128"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29" style:family="paragraph" style:parent-style-name="Text_20_body">
      <style:text-properties style:text-underline-style="none" fo:font-weight="normal" officeooo:paragraph-rsid="00710b8f" style:font-weight-asian="normal" style:font-weight-complex="normal"/>
    </style:style>
    <style:style style:name="P130"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31" style:family="paragraph" style:parent-style-name="Heading_20_1">
      <style:text-properties fo:language="fr" fo:country="FR" officeooo:rsid="0018e5d8" officeooo:paragraph-rsid="0058505f"/>
    </style:style>
    <style:style style:name="P132" style:family="paragraph" style:parent-style-name="Text_20_body">
      <style:text-properties officeooo:paragraph-rsid="00dc378e"/>
    </style:style>
    <style:style style:name="P133" style:family="paragraph" style:parent-style-name="Text_20_body">
      <style:text-properties fo:language="fr" fo:country="FR" officeooo:paragraph-rsid="025c4999"/>
    </style:style>
    <style:style style:name="P134" style:family="paragraph" style:parent-style-name="Text_20_body">
      <style:text-properties fo:language="fr" fo:country="FR" officeooo:paragraph-rsid="007c0baa"/>
    </style:style>
    <style:style style:name="P135"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136" style:family="paragraph" style:parent-style-name="Text_20_body">
      <style:text-properties fo:language="fr" fo:country="FR" officeooo:paragraph-rsid="00dc378e"/>
    </style:style>
    <style:style style:name="P137"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138"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139" style:family="paragraph" style:parent-style-name="Heading_20_1">
      <style:paragraph-properties fo:break-before="page"/>
      <style:text-properties fo:language="fr" fo:country="FR" officeooo:rsid="0018e5d8" officeooo:paragraph-rsid="01dd6602"/>
    </style:style>
    <style:style style:name="P140" style:family="paragraph" style:parent-style-name="Text_20_body">
      <style:text-properties officeooo:paragraph-rsid="01dd6602"/>
    </style:style>
    <style:style style:name="P141" style:family="paragraph">
      <loext:graphic-properties draw:fill="none" draw:fill-color="#ffffff"/>
    </style:style>
    <style:style style:name="P142" style:family="paragraph" style:parent-style-name="Text_20_body">
      <style:paragraph-properties fo:break-before="page"/>
      <style:text-properties fo:language="fr" fo:country="FR" officeooo:rsid="01de9a0e" officeooo:paragraph-rsid="01de9a0e"/>
    </style:style>
    <style:style style:name="P143" style:family="paragraph" style:parent-style-name="Text_20_body">
      <style:text-properties fo:language="fr" fo:country="FR" officeooo:rsid="01de9a0e" officeooo:paragraph-rsid="01de9a0e"/>
    </style:style>
    <style:style style:name="P144" style:family="paragraph" style:parent-style-name="Text_20_body">
      <style:text-properties fo:language="fr" fo:country="FR" officeooo:rsid="01e1a6b6" officeooo:paragraph-rsid="01e1a6b6"/>
    </style:style>
    <style:style style:name="P145" style:family="paragraph" style:parent-style-name="Text_20_body">
      <style:text-properties fo:language="fr" fo:country="FR" officeooo:rsid="01e397e6" officeooo:paragraph-rsid="01e397e6"/>
    </style:style>
    <style:style style:name="P146" style:family="paragraph" style:parent-style-name="Text_20_body">
      <style:text-properties fo:language="fr" fo:country="FR" officeooo:rsid="01e9a570" officeooo:paragraph-rsid="01e9a570"/>
    </style:style>
    <style:style style:name="P147" style:family="paragraph" style:parent-style-name="Text_20_body">
      <style:text-properties fo:language="fr" fo:country="FR" officeooo:rsid="01fe9861" officeooo:paragraph-rsid="01fe9861"/>
    </style:style>
    <style:style style:name="P148" style:family="paragraph" style:parent-style-name="Text_20_body">
      <style:paragraph-properties fo:break-before="page"/>
      <style:text-properties fo:language="fr" fo:country="FR" officeooo:rsid="01e1a6b6" officeooo:paragraph-rsid="01e1a6b6"/>
    </style:style>
    <style:style style:name="P149" style:family="paragraph" style:parent-style-name="Text_20_body">
      <style:text-properties fo:language="fr" fo:country="FR" style:text-underline-style="solid" style:text-underline-width="auto" style:text-underline-color="font-color" fo:font-weight="bold" officeooo:rsid="01fe9861" officeooo:paragraph-rsid="01fe9861" style:font-weight-asian="bold" style:font-weight-complex="bold"/>
    </style:style>
    <style:style style:name="P150" style:family="paragraph" style:parent-style-name="Text_20_body">
      <style:text-properties fo:language="fr" fo:country="FR" style:text-underline-style="none" fo:font-weight="normal" officeooo:rsid="01fe9861" officeooo:paragraph-rsid="021090e9" style:font-weight-asian="normal" style:font-weight-complex="normal"/>
    </style:style>
    <style:style style:name="P151" style:family="paragraph" style:parent-style-name="Text_20_body">
      <style:text-properties fo:language="fr" fo:country="FR" style:text-underline-style="none" fo:font-weight="normal" officeooo:rsid="021090e9" officeooo:paragraph-rsid="021090e9" style:font-weight-asian="normal" style:font-weight-complex="normal"/>
    </style:style>
    <style:style style:name="P152" style:family="paragraph" style:parent-style-name="Text_20_body">
      <style:text-properties fo:language="fr" fo:country="FR" style:text-underline-style="none" fo:font-weight="normal" officeooo:rsid="01fe9861" officeooo:paragraph-rsid="01fe9861" style:font-weight-asian="normal" style:font-weight-complex="normal"/>
    </style:style>
    <style:style style:name="P153" style:family="paragraph" style:parent-style-name="Text_20_body">
      <style:text-properties fo:language="fr" fo:country="FR" officeooo:rsid="004d3aba" officeooo:paragraph-rsid="004d3aba"/>
    </style:style>
    <style:style style:name="T1" style:family="text">
      <style:text-properties officeooo:rsid="0253cc83"/>
    </style:style>
    <style:style style:name="T2" style:family="text">
      <style:text-properties officeooo:rsid="00105800"/>
    </style:style>
    <style:style style:name="T3" style:family="text">
      <style:text-properties fo:font-size="14pt" fo:language="fr" fo:country="FR" style:text-underline-style="none" officeooo:rsid="00105800" style:font-size-asian="14pt" style:font-size-complex="14pt"/>
    </style:style>
    <style:style style:name="T4" style:family="text">
      <style:text-properties fo:font-size="14pt" style:font-size-asian="14pt" style:font-size-complex="14pt"/>
    </style:style>
    <style:style style:name="T5" style:family="text">
      <style:text-properties fo:font-weight="normal" officeooo:rsid="015973c0" style:font-weight-asian="normal" style:font-weight-complex="normal"/>
    </style:style>
    <style:style style:name="T6" style:family="text">
      <style:text-properties fo:font-weight="normal" style:font-weight-asian="normal" style:font-weight-complex="normal"/>
    </style:style>
    <style:style style:name="T7" style:family="text">
      <style:text-properties fo:font-weight="normal" officeooo:rsid="02613cc5" style:font-weight-asian="normal" style:font-weight-complex="normal"/>
    </style:style>
    <style:style style:name="T8" style:family="text">
      <style:text-properties fo:font-weight="normal" officeooo:rsid="02689273" style:font-weight-asian="normal" style:font-weight-complex="normal"/>
    </style:style>
    <style:style style:name="T9" style:family="text">
      <style:text-properties officeooo:rsid="001371d4"/>
    </style:style>
    <style:style style:name="T10" style:family="text">
      <style:text-properties officeooo:rsid="001d2e18"/>
    </style:style>
    <style:style style:name="T11" style:family="text">
      <style:text-properties officeooo:rsid="005b1307"/>
    </style:style>
    <style:style style:name="T12" style:family="text">
      <style:text-properties officeooo:rsid="025f51e0"/>
    </style:style>
    <style:style style:name="T13" style:family="text">
      <style:text-properties officeooo:rsid="016dc2e8"/>
    </style:style>
    <style:style style:name="T14" style:family="text">
      <style:text-properties officeooo:rsid="01590594"/>
    </style:style>
    <style:style style:name="T15" style:family="text">
      <style:text-properties officeooo:rsid="02689273"/>
    </style:style>
    <style:style style:name="T16" style:family="text">
      <style:text-properties officeooo:rsid="01aa7590"/>
    </style:style>
    <style:style style:name="T17" style:family="text">
      <style:text-properties officeooo:rsid="02392818"/>
    </style:style>
    <style:style style:name="T18" style:family="text">
      <style:text-properties officeooo:rsid="0253798b"/>
    </style:style>
    <style:style style:name="T19" style:family="text">
      <style:text-properties officeooo:rsid="0253f122"/>
    </style:style>
    <style:style style:name="T20" style:family="text">
      <style:text-properties officeooo:rsid="025cb355"/>
    </style:style>
    <style:style style:name="T21" style:family="text">
      <style:text-properties officeooo:rsid="024ffde6"/>
    </style:style>
    <style:style style:name="T22" style:family="text">
      <style:text-properties officeooo:rsid="0240031c"/>
    </style:style>
    <style:style style:name="T23" style:family="text">
      <style:text-properties officeooo:rsid="0012d332"/>
    </style:style>
    <style:style style:name="T24" style:family="text">
      <style:text-properties officeooo:rsid="01f30051"/>
    </style:style>
    <style:style style:name="T25" style:family="text">
      <style:text-properties officeooo:rsid="02496ab9"/>
    </style:style>
    <style:style style:name="T26" style:family="text">
      <style:text-properties style:text-underline-style="solid" style:text-underline-width="auto" style:text-underline-color="font-color"/>
    </style:style>
    <style:style style:name="T27" style:family="text">
      <style:text-properties officeooo:rsid="00220019"/>
    </style:style>
    <style:style style:name="T28" style:family="text">
      <style:text-properties officeooo:rsid="00342cce"/>
    </style:style>
    <style:style style:name="T29" style:family="text">
      <style:text-properties fo:language="fr" fo:country="FR"/>
    </style:style>
    <style:style style:name="T30" style:family="text">
      <style:text-properties fo:language="fr" fo:country="FR" officeooo:rsid="00c3391c"/>
    </style:style>
    <style:style style:name="T31" style:family="text">
      <style:text-properties fo:language="fr" fo:country="FR" officeooo:rsid="02689273"/>
    </style:style>
    <style:style style:name="T32" style:family="text">
      <style:text-properties fo:language="fr" fo:country="FR" officeooo:rsid="0015f378"/>
    </style:style>
    <style:style style:name="T33" style:family="text">
      <style:text-properties fo:language="fr" fo:country="FR" officeooo:rsid="0177845d"/>
    </style:style>
    <style:style style:name="T34" style:family="text">
      <style:text-properties officeooo:rsid="002ad4e8"/>
    </style:style>
    <style:style style:name="T35" style:family="text">
      <style:text-properties officeooo:rsid="0177845d"/>
    </style:style>
    <style:style style:name="T36" style:family="text">
      <style:text-properties officeooo:rsid="00e3eaf9"/>
    </style:style>
    <style:style style:name="T37" style:family="text">
      <style:text-properties officeooo:rsid="01cf8e8c"/>
    </style:style>
    <style:style style:name="T38" style:family="text">
      <style:text-properties officeooo:rsid="026228f2"/>
    </style:style>
    <style:style style:name="T39" style:family="text">
      <style:text-properties officeooo:rsid="00136237"/>
    </style:style>
    <style:style style:name="T40" style:family="text">
      <style:text-properties officeooo:rsid="0229e7e8"/>
    </style:style>
    <style:style style:name="T41" style:family="text">
      <style:text-properties officeooo:rsid="00274a6a"/>
    </style:style>
    <style:style style:name="T42" style:family="text">
      <style:text-properties officeooo:rsid="0019b662"/>
    </style:style>
    <style:style style:name="T43" style:family="text">
      <style:text-properties officeooo:rsid="022851a3"/>
    </style:style>
    <style:style style:name="T44" style:family="text">
      <style:text-properties officeooo:rsid="0050e736"/>
    </style:style>
    <style:style style:name="T45" style:family="text">
      <style:text-properties fo:font-size="15pt" style:font-size-asian="15pt" style:font-size-complex="15pt"/>
    </style:style>
    <style:style style:name="T46" style:family="text">
      <style:text-properties style:text-underline-style="solid" style:text-underline-width="auto" style:text-underline-color="font-color" fo:font-weight="bold" officeooo:rsid="01ef7eb7" style:font-weight-asian="bold" style:font-weight-complex="bold"/>
    </style:style>
    <style:style style:name="T47" style:family="text">
      <style:text-properties style:text-underline-style="none" fo:font-weight="normal" officeooo:rsid="01ef7eb7" style:font-weight-asian="normal" style:font-weight-complex="normal"/>
    </style:style>
    <style:style style:name="T48" style:family="text">
      <style:text-properties officeooo:rsid="01f186c7"/>
    </style:style>
    <style:style style:name="T49" style:family="text">
      <style:text-properties officeooo:rsid="020034a3"/>
    </style:style>
    <style:style style:name="T50" style:family="text">
      <style:text-properties officeooo:rsid="0033ca9f"/>
    </style:style>
    <style:style style:name="T51" style:family="text">
      <style:text-properties officeooo:rsid="00f5f665"/>
    </style:style>
    <style:style style:name="T52" style:family="text">
      <style:text-properties officeooo:rsid="0210b576"/>
    </style:style>
    <style:style style:name="T53" style:family="text">
      <style:text-properties officeooo:rsid="01f48bee"/>
    </style:style>
    <style:style style:name="T54" style:family="text">
      <style:text-properties officeooo:rsid="020366a8"/>
    </style:style>
    <style:style style:name="T55" style:family="text">
      <style:text-properties officeooo:rsid="022620ea"/>
    </style:style>
    <style:style style:name="T56" style:family="text">
      <style:text-properties officeooo:rsid="022b16b4"/>
    </style:style>
    <style:style style:name="T57" style:family="text">
      <style:text-properties officeooo:rsid="020b9bc5"/>
    </style:style>
    <style:style style:name="T58" style:family="text">
      <style:text-properties officeooo:rsid="02016a9b"/>
    </style:style>
    <style:style style:name="T59" style:family="text">
      <style:text-properties officeooo:rsid="022bacdc"/>
    </style:style>
    <style:style style:name="T60" style:family="text">
      <style:text-properties officeooo:rsid="02113008"/>
    </style:style>
    <style:style style:name="T61" style:family="text">
      <style:text-properties officeooo:rsid="0015f378"/>
    </style:style>
    <style:style style:name="T62" style:family="text">
      <style:text-properties officeooo:rsid="001603fd"/>
    </style:style>
    <style:style style:name="T63" style:family="text">
      <style:text-properties style:text-underline-style="solid" style:text-underline-width="auto" style:text-underline-color="font-color" fo:font-weight="bold" officeooo:rsid="001603fd" style:font-weight-asian="bold" style:font-weight-complex="bold"/>
    </style:style>
    <style:style style:name="T64" style:family="text">
      <style:text-properties officeooo:rsid="00cb816d"/>
    </style:style>
    <style:style style:name="T65" style:family="text">
      <style:text-properties officeooo:rsid="021d8cc1"/>
    </style:style>
    <style:style style:name="T66" style:family="text">
      <style:text-properties officeooo:rsid="01f11012"/>
    </style:style>
    <style:style style:name="T67" style:family="text">
      <style:text-properties officeooo:rsid="01155c0d"/>
    </style:style>
    <style:style style:name="T68" style:family="text">
      <style:text-properties officeooo:rsid="0044bf4f"/>
    </style:style>
    <style:style style:name="T69" style:family="text">
      <style:text-properties officeooo:rsid="001eccd4"/>
    </style:style>
    <style:style style:name="T70" style:family="text">
      <style:text-properties officeooo:rsid="0236abd3"/>
    </style:style>
    <style:style style:name="T71" style:family="text">
      <style:text-properties officeooo:rsid="004265de"/>
    </style:style>
    <style:style style:name="T72" style:family="text">
      <style:text-properties officeooo:rsid="00d725f0"/>
    </style:style>
    <style:style style:name="T73" style:family="text">
      <style:text-properties officeooo:rsid="011caeb9"/>
    </style:style>
    <style:style style:name="T74" style:family="text">
      <style:text-properties officeooo:rsid="011ea142"/>
    </style:style>
    <style:style style:name="T75" style:family="text">
      <style:text-properties officeooo:rsid="02576a0d"/>
    </style:style>
    <style:style style:name="T76" style:family="text">
      <style:text-properties officeooo:rsid="0258c166"/>
    </style:style>
    <style:style style:name="T77" style:family="text">
      <style:text-properties officeooo:rsid="00ca32ab"/>
    </style:style>
    <style:style style:name="T78" style:family="text">
      <style:text-properties officeooo:rsid="0032f3cd"/>
    </style:style>
    <style:style style:name="T79" style:family="text">
      <style:text-properties officeooo:rsid="00ab9f2f"/>
    </style:style>
    <style:style style:name="T80" style:family="text">
      <style:text-properties officeooo:rsid="002cfb44"/>
    </style:style>
    <style:style style:name="T81" style:family="text">
      <style:text-properties officeooo:rsid="01d98cbe"/>
    </style:style>
    <style:style style:name="T82" style:family="text">
      <style:text-properties officeooo:rsid="0263010f"/>
    </style:style>
    <style:style style:name="T83" style:family="text">
      <style:text-properties officeooo:rsid="01548b13"/>
    </style:style>
    <style:style style:name="T84" style:family="text">
      <style:text-properties officeooo:rsid="00fd283c"/>
    </style:style>
    <style:style style:name="T85" style:family="text">
      <style:text-properties officeooo:rsid="001a8163"/>
    </style:style>
    <style:style style:name="T86" style:family="text">
      <style:text-properties officeooo:rsid="00179d24"/>
    </style:style>
    <style:style style:name="T87" style:family="text">
      <style:text-properties officeooo:rsid="0024499e"/>
    </style:style>
    <style:style style:name="T88" style:family="text">
      <style:text-properties officeooo:rsid="00317f05"/>
    </style:style>
    <style:style style:name="T89" style:family="text">
      <style:text-properties officeooo:rsid="0024ec31"/>
    </style:style>
    <style:style style:name="T90" style:family="text">
      <style:text-properties officeooo:rsid="01450462"/>
    </style:style>
    <style:style style:name="T91" style:family="text">
      <style:text-properties officeooo:rsid="01445fc1"/>
    </style:style>
    <style:style style:name="T92" style:family="text">
      <style:text-properties officeooo:rsid="00c6d128"/>
    </style:style>
    <style:style style:name="T93" style:family="text">
      <style:text-properties officeooo:rsid="0168e881"/>
    </style:style>
    <style:style style:name="T94" style:family="text">
      <style:text-properties officeooo:rsid="01ccc771"/>
    </style:style>
    <style:style style:name="T95" style:family="text">
      <style:text-properties officeooo:rsid="01cee272"/>
    </style:style>
    <style:style style:name="T96" style:family="text">
      <style:text-properties officeooo:rsid="014ace1b"/>
    </style:style>
    <style:style style:name="T97" style:family="text">
      <style:text-properties officeooo:rsid="0033e054"/>
    </style:style>
    <style:style style:name="T98" style:family="text">
      <style:text-properties style:text-underline-style="solid" style:text-underline-width="auto" style:text-underline-color="font-color" fo:font-weight="bold" style:font-weight-asian="bold" style:font-weight-complex="bold"/>
    </style:style>
    <style:style style:name="T99" style:family="text">
      <style:text-properties style:text-underline-style="solid" style:text-underline-width="auto" style:text-underline-color="font-color" fo:font-weight="bold" officeooo:rsid="004d3aba" style:font-weight-asian="bold" style:font-weight-complex="bold"/>
    </style:style>
    <style:style style:name="T100" style:family="text">
      <style:text-properties officeooo:rsid="0048588b"/>
    </style:style>
    <style:style style:name="T101" style:family="text">
      <style:text-properties officeooo:rsid="004dcdf2"/>
    </style:style>
    <style:style style:name="T102" style:family="text">
      <style:text-properties officeooo:rsid="00621149"/>
    </style:style>
    <style:style style:name="T103" style:family="text">
      <style:text-properties officeooo:rsid="01d6a4f2"/>
    </style:style>
    <style:style style:name="T104" style:family="text">
      <style:text-properties officeooo:rsid="0063b7f3"/>
    </style:style>
    <style:style style:name="T105" style:family="text">
      <style:text-properties officeooo:rsid="0082c8a2"/>
    </style:style>
    <style:style style:name="T106" style:family="text">
      <style:text-properties officeooo:rsid="0082f495"/>
    </style:style>
    <style:style style:name="T107" style:family="text">
      <style:text-properties officeooo:rsid="009119b0"/>
    </style:style>
    <style:style style:name="T108" style:family="text">
      <style:text-properties officeooo:rsid="0094fbbc"/>
    </style:style>
    <style:style style:name="T109" style:family="text">
      <style:text-properties officeooo:rsid="0096c2c1"/>
    </style:style>
    <style:style style:name="T110" style:family="text">
      <style:text-properties style:text-underline-style="solid" style:text-underline-width="auto" style:text-underline-color="font-color" fo:font-weight="bold" officeooo:rsid="0044bf4f" style:font-weight-asian="bold" style:font-weight-complex="bold"/>
    </style:style>
    <style:style style:name="T111" style:family="text">
      <style:text-properties style:text-underline-style="solid" style:text-underline-width="auto" style:text-underline-color="font-color" fo:font-weight="bold" officeooo:rsid="012e0816" style:font-weight-asian="bold" style:font-weight-complex="bold"/>
    </style:style>
    <style:style style:name="T112" style:family="text">
      <style:text-properties officeooo:rsid="00b8c25d"/>
    </style:style>
    <style:style style:name="T113" style:family="text">
      <style:text-properties officeooo:rsid="00ba172a"/>
    </style:style>
    <style:style style:name="T114" style:family="text">
      <style:text-properties officeooo:rsid="00f1c3fc"/>
    </style:style>
    <style:style style:name="T115" style:family="text">
      <style:text-properties officeooo:rsid="00f3d0ed"/>
    </style:style>
    <style:style style:name="T116" style:family="text">
      <style:text-properties officeooo:rsid="012e0816"/>
    </style:style>
    <style:style style:name="T117" style:family="text">
      <style:text-properties officeooo:rsid="0125fbf8"/>
    </style:style>
    <style:style style:name="T118" style:family="text">
      <style:text-properties officeooo:rsid="0120ab03"/>
    </style:style>
    <style:style style:name="T119" style:family="text">
      <style:text-properties officeooo:rsid="00206988"/>
    </style:style>
    <style:style style:name="T120" style:family="text">
      <style:text-properties officeooo:rsid="00362c84"/>
    </style:style>
    <style:style style:name="T121" style:family="text">
      <style:text-properties fo:font-style="normal" style:font-style-asian="normal" style:font-style-complex="normal"/>
    </style:style>
    <style:style style:name="T122" style:family="text">
      <style:text-properties fo:font-style="normal" officeooo:rsid="0120ab03" style:font-style-asian="normal" style:font-style-complex="normal"/>
    </style:style>
    <style:style style:name="T123" style:family="text">
      <style:text-properties officeooo:rsid="0224d818"/>
    </style:style>
    <style:style style:name="T124" style:family="text">
      <style:text-properties officeooo:rsid="0113e5e4"/>
    </style:style>
    <style:style style:name="T125" style:family="text">
      <style:text-properties officeooo:rsid="0125ec14"/>
    </style:style>
    <style:style style:name="T126" style:family="text">
      <style:text-properties officeooo:rsid="01265d2c"/>
    </style:style>
    <style:style style:name="T127" style:family="text">
      <style:text-properties officeooo:rsid="0220d48f"/>
    </style:style>
    <style:style style:name="T128" style:family="text">
      <style:text-properties officeooo:rsid="021ea1ee"/>
    </style:style>
    <style:style style:name="T129" style:family="text">
      <style:text-properties officeooo:rsid="01c87e4c"/>
    </style:style>
    <style:style style:name="T130" style:family="text">
      <style:text-properties officeooo:rsid="012f165d"/>
    </style:style>
    <style:style style:name="T131" style:family="text">
      <style:text-properties officeooo:rsid="01321231"/>
    </style:style>
    <style:style style:name="T132" style:family="text">
      <style:text-properties style:text-underline-style="none" fo:font-weight="normal" style:font-weight-asian="normal" style:font-weight-complex="normal"/>
    </style:style>
    <style:style style:name="T133" style:family="text">
      <style:text-properties style:text-underline-style="none" fo:font-weight="normal" officeooo:rsid="020c052b" style:font-weight-asian="normal" style:font-weight-complex="normal"/>
    </style:style>
    <style:style style:name="T134" style:family="text">
      <style:text-properties officeooo:rsid="0127cfb5"/>
    </style:style>
    <style:style style:name="T135" style:family="text">
      <style:text-properties officeooo:rsid="01272703"/>
    </style:style>
    <style:style style:name="T136" style:family="text">
      <style:text-properties officeooo:rsid="006c0ad6"/>
    </style:style>
    <style:style style:name="T137" style:family="text">
      <style:text-properties officeooo:rsid="0076b25c"/>
    </style:style>
    <style:style style:name="T138" style:family="text">
      <style:text-properties officeooo:rsid="007a4ed2"/>
    </style:style>
    <style:style style:name="T139" style:family="text">
      <style:text-properties officeooo:rsid="025a7db8"/>
    </style:style>
    <style:style style:name="T140" style:family="text">
      <style:text-properties officeooo:rsid="0080bb02"/>
    </style:style>
    <style:style style:name="T141" style:family="text">
      <style:text-properties officeooo:rsid="00568592"/>
    </style:style>
    <style:style style:name="T142" style:family="text">
      <style:text-properties officeooo:rsid="0014bfe8"/>
    </style:style>
    <style:style style:name="T143" style:family="text">
      <style:text-properties officeooo:rsid="02649a42"/>
    </style:style>
    <style:style style:name="T144" style:family="text">
      <style:text-properties officeooo:rsid="01aef87e"/>
    </style:style>
    <style:style style:name="T145" style:family="text">
      <style:text-properties officeooo:rsid="020c052b"/>
    </style:style>
    <style:style style:name="T146" style:family="text">
      <style:text-properties officeooo:rsid="02135fa8"/>
    </style:style>
    <style:style style:name="T147" style:family="text">
      <style:text-properties officeooo:rsid="02154dbc"/>
    </style:style>
    <style:style style:name="T148" style:family="text">
      <style:text-properties officeooo:rsid="01799c81"/>
    </style:style>
    <style:style style:name="T149" style:family="text">
      <style:text-properties fo:font-style="normal" officeooo:rsid="00529221" style:font-style-asian="normal" style:font-style-complex="normal"/>
    </style:style>
    <style:style style:name="T150" style:family="text">
      <style:text-properties fo:font-style="normal" officeooo:rsid="007a4ed2" style:font-style-asian="normal" style:font-style-complex="normal"/>
    </style:style>
    <style:style style:name="T151" style:family="text">
      <style:text-properties fo:font-style="normal" officeooo:rsid="00a084de" style:font-style-asian="normal" style:font-style-complex="normal"/>
    </style:style>
    <style:style style:name="T152" style:family="text">
      <style:text-properties officeooo:rsid="008df222"/>
    </style:style>
    <style:style style:name="T153" style:family="text">
      <style:text-properties officeooo:rsid="008f4265"/>
    </style:style>
    <style:style style:name="T154" style:family="text">
      <style:text-properties officeooo:rsid="02660a08"/>
    </style:style>
    <style:style style:name="T155" style:family="text">
      <style:text-properties fo:font-style="normal" officeooo:rsid="0050e736" style:font-style-asian="normal" style:font-style-complex="normal"/>
    </style:style>
    <style:style style:name="T156" style:family="text">
      <style:text-properties fo:font-style="normal" officeooo:rsid="00568592" style:font-style-asian="normal" style:font-style-complex="normal"/>
    </style:style>
    <style:style style:name="T157" style:family="text">
      <style:text-properties fo:font-style="normal" officeooo:rsid="00a2c9da" style:font-style-asian="normal" style:font-style-complex="normal"/>
    </style:style>
    <style:style style:name="T158" style:family="text">
      <style:text-properties officeooo:rsid="0128b585"/>
    </style:style>
    <style:style style:name="T159" style:family="text">
      <style:text-properties officeooo:rsid="01c68d5c"/>
    </style:style>
    <style:style style:name="T160" style:family="text">
      <style:text-properties style:text-underline-style="none" fo:font-weight="normal" officeooo:rsid="0085ba02" style:font-weight-asian="normal" style:font-weight-complex="normal"/>
    </style:style>
    <style:style style:name="T161" style:family="text">
      <style:text-properties style:text-underline-style="none" fo:font-weight="normal" officeooo:rsid="0128b585" style:font-weight-asian="normal" style:font-weight-complex="normal"/>
    </style:style>
    <style:style style:name="T162" style:family="text">
      <style:text-properties style:text-underline-style="none" fo:font-weight="normal" officeooo:rsid="01799c81" style:font-weight-asian="normal" style:font-weight-complex="normal"/>
    </style:style>
    <style:style style:name="T163" style:family="text">
      <style:text-properties style:text-underline-style="none" fo:font-weight="normal" officeooo:rsid="009cfa39" style:font-weight-asian="normal" style:font-weight-complex="normal"/>
    </style:style>
    <style:style style:name="T164" style:family="text">
      <style:text-properties style:text-underline-style="none" fo:font-weight="normal" officeooo:rsid="008d4f35" style:font-weight-asian="normal" style:font-weight-complex="normal"/>
    </style:style>
    <style:style style:name="T165" style:family="text">
      <style:text-properties style:text-underline-style="none" fo:font-weight="normal" officeooo:rsid="02076d23" style:font-weight-asian="normal" style:font-weight-complex="normal"/>
    </style:style>
    <style:style style:name="T166" style:family="text">
      <style:text-properties style:text-underline-style="none" fo:font-weight="normal" officeooo:rsid="009eaca5" style:font-weight-asian="normal" style:font-weight-complex="normal"/>
    </style:style>
    <style:style style:name="T167" style:family="text">
      <style:text-properties style:text-underline-style="none" fo:font-weight="normal" officeooo:rsid="01c68d5c" style:font-weight-asian="normal" style:font-weight-complex="normal"/>
    </style:style>
    <style:style style:name="T168" style:family="text">
      <style:text-properties style:text-underline-style="none" fo:font-weight="normal" officeooo:rsid="00d16ff7" style:font-weight-asian="normal" style:font-weight-complex="normal"/>
    </style:style>
    <style:style style:name="T169" style:family="text">
      <style:text-properties officeooo:rsid="02663779"/>
    </style:style>
    <style:style style:name="T170" style:family="text">
      <style:text-properties style:text-underline-style="none" fo:font-weight="normal" officeooo:rsid="02663779" style:font-weight-asian="normal" style:font-weight-complex="normal"/>
    </style:style>
    <style:style style:name="T171" style:family="text">
      <style:text-properties officeooo:rsid="0211a341"/>
    </style:style>
    <style:style style:name="T172" style:family="text">
      <style:text-properties officeooo:rsid="020f5666"/>
    </style:style>
    <style:style style:name="T173" style:family="text">
      <style:text-properties officeooo:rsid="012d4933"/>
    </style:style>
    <style:style style:name="T174" style:family="text">
      <style:text-properties officeooo:rsid="01b3f1f2"/>
    </style:style>
    <style:style style:name="T175" style:family="text">
      <style:text-properties style:text-underline-style="none" fo:font-weight="normal" officeooo:rsid="012d4933" style:font-weight-asian="normal" style:font-weight-complex="normal"/>
    </style:style>
    <style:style style:name="T176" style:family="text">
      <style:text-properties style:text-underline-style="none" fo:font-weight="normal" officeooo:rsid="01c5abd2" style:font-weight-asian="normal" style:font-weight-complex="normal"/>
    </style:style>
    <style:style style:name="T177" style:family="text">
      <style:text-properties style:text-underline-style="none" fo:font-weight="normal" officeooo:rsid="01d18a44" style:font-weight-asian="normal" style:font-weight-complex="normal"/>
    </style:style>
    <style:style style:name="T178" style:family="text">
      <style:text-properties officeooo:rsid="01d18a44"/>
    </style:style>
    <style:style style:name="T179" style:family="text">
      <style:text-properties officeooo:rsid="0039c152"/>
    </style:style>
    <style:style style:name="T180" style:family="text">
      <style:text-properties officeooo:rsid="004abab4"/>
    </style:style>
    <style:style style:name="T181" style:family="text">
      <style:text-properties officeooo:rsid="006f2913"/>
    </style:style>
    <style:style style:name="T182" style:family="text">
      <style:text-properties officeooo:rsid="01c4b515"/>
    </style:style>
    <style:style style:name="T183" style:family="text">
      <style:text-properties style:text-underline-style="solid" style:text-underline-width="auto" style:text-underline-color="font-color" fo:font-weight="bold" officeooo:rsid="01f186c7" style:font-weight-asian="bold" style:font-weight-complex="bold"/>
    </style:style>
    <style:style style:name="T184" style:family="text">
      <style:text-properties fo:font-weight="normal" officeooo:rsid="0014bfe8" style:font-weight-asian="normal" style:font-weight-complex="normal"/>
    </style:style>
    <style:style style:name="T185" style:family="text">
      <style:text-properties officeooo:rsid="003aa0c3"/>
    </style:style>
    <style:style style:name="T186" style:family="text">
      <style:text-properties officeooo:rsid="013cd073"/>
    </style:style>
    <style:style style:name="T187" style:family="text">
      <style:text-properties officeooo:rsid="00b4c9a6"/>
    </style:style>
    <style:style style:name="T188" style:family="text">
      <style:text-properties officeooo:rsid="00300d48"/>
    </style:style>
    <style:style style:name="T189" style:family="text">
      <style:text-properties officeooo:rsid="00ba3090"/>
    </style:style>
    <style:style style:name="T190" style:family="text">
      <style:text-properties officeooo:rsid="018748e3"/>
    </style:style>
    <style:style style:name="T191" style:family="text">
      <style:text-properties officeooo:rsid="01a376be"/>
    </style:style>
    <style:style style:name="T192" style:family="text">
      <style:text-properties officeooo:rsid="00ef25a2"/>
    </style:style>
    <style:style style:name="T193" style:family="text">
      <style:text-properties officeooo:rsid="01119410"/>
    </style:style>
    <style:style style:name="T194" style:family="text">
      <style:text-properties officeooo:rsid="013fb310"/>
    </style:style>
    <style:style style:name="T195" style:family="text">
      <style:text-properties officeooo:rsid="015011b0"/>
    </style:style>
    <style:style style:name="T196" style:family="text">
      <style:text-properties officeooo:rsid="01c45708"/>
    </style:style>
    <style:style style:name="T197" style:family="text">
      <style:text-properties officeooo:rsid="002d2798"/>
    </style:style>
    <style:style style:name="T198" style:family="text">
      <style:text-properties officeooo:rsid="01c45748"/>
    </style:style>
    <style:style style:name="T199" style:family="text">
      <style:text-properties officeooo:rsid="01125ca6"/>
    </style:style>
    <style:style style:name="T200" style:family="text">
      <style:text-properties officeooo:rsid="02667bb6"/>
    </style:style>
    <style:style style:name="T201" style:family="text">
      <style:text-properties officeooo:rsid="01009302"/>
    </style:style>
    <style:style style:name="T202" style:family="text">
      <style:text-properties officeooo:rsid="01f8405e"/>
    </style:style>
    <style:style style:name="T203" style:family="text">
      <style:text-properties officeooo:rsid="02279415"/>
    </style:style>
    <style:style style:name="T204" style:family="text">
      <style:text-properties fo:language="fr" fo:country="FR" officeooo:rsid="00b4c9a6"/>
    </style:style>
    <style:style style:name="T205" style:family="text">
      <style:text-properties fo:language="fr" fo:country="FR" officeooo:rsid="001d2e18"/>
    </style:style>
    <style:style style:name="T206" style:family="text">
      <style:text-properties fo:language="fr" fo:country="FR" officeooo:rsid="002d2798"/>
    </style:style>
    <style:style style:name="T207" style:family="text">
      <style:text-properties fo:language="fr" fo:country="FR" officeooo:rsid="01a7ce10"/>
    </style:style>
    <style:style style:name="T208" style:family="text">
      <style:text-properties officeooo:rsid="01a7ce10"/>
    </style:style>
    <style:style style:name="T209" style:family="text">
      <style:text-properties officeooo:rsid="01c08ea1"/>
    </style:style>
    <style:style style:name="T210" style:family="text">
      <style:text-properties officeooo:rsid="003c163e"/>
    </style:style>
    <style:style style:name="T211" style:family="text">
      <style:text-properties fo:language="fr" fo:country="FR" officeooo:rsid="0018e5d8"/>
    </style:style>
    <style:style style:name="T212" style:family="text">
      <style:text-properties fo:language="fr" fo:country="FR" officeooo:rsid="002f085d"/>
    </style:style>
    <style:style style:name="T213" style:family="text">
      <style:text-properties fo:language="fr" fo:country="FR" officeooo:rsid="011a3382"/>
    </style:style>
    <style:style style:name="T214" style:family="text">
      <style:text-properties fo:language="fr" fo:country="FR" officeooo:rsid="00a2c9da"/>
    </style:style>
    <style:style style:name="T215" style:family="text">
      <style:text-properties fo:language="fr" fo:country="FR" officeooo:rsid="0056e984"/>
    </style:style>
    <style:style style:name="T216" style:family="text">
      <style:text-properties fo:language="fr" fo:country="FR" officeooo:rsid="00ab9f2f"/>
    </style:style>
    <style:style style:name="T217" style:family="text">
      <style:text-properties fo:language="fr" fo:country="FR" officeooo:rsid="016743cf"/>
    </style:style>
    <style:style style:name="T218" style:family="text">
      <style:text-properties fo:language="fr" fo:country="FR" officeooo:rsid="01c04cbf"/>
    </style:style>
    <style:style style:name="T219" style:family="text">
      <style:text-properties officeooo:rsid="003ee0a5"/>
    </style:style>
    <style:style style:name="T220" style:family="text">
      <style:text-properties officeooo:rsid="00541fa5"/>
    </style:style>
    <style:style style:name="T221" style:family="text">
      <style:text-properties officeooo:rsid="0056e984"/>
    </style:style>
    <style:style style:name="T222" style:family="text">
      <style:text-properties officeooo:rsid="012539f2"/>
    </style:style>
    <style:style style:name="T223" style:family="text">
      <style:text-properties fo:font-style="normal" fo:font-weight="normal" style:font-style-asian="normal" style:font-weight-asian="normal" style:font-style-complex="normal" style:font-weight-complex="normal"/>
    </style:style>
    <style:style style:name="T224"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225"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226" style:family="text">
      <style:text-properties fo:language="fr" fo:country="FR" fo:font-style="normal" style:text-underline-style="none" fo:font-weight="normal" style:font-style-asian="normal" style:font-weight-asian="normal" style:font-style-complex="normal" style:font-weight-complex="normal"/>
    </style:style>
    <style:style style:name="T227"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228"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229" style:family="text">
      <style:text-properties officeooo:rsid="01ba435b"/>
    </style:style>
    <style:style style:name="T230" style:family="text">
      <style:text-properties officeooo:rsid="025af837"/>
    </style:style>
    <style:style style:name="T231" style:family="text">
      <style:text-properties officeooo:rsid="011a3382"/>
    </style:style>
    <style:style style:name="T232" style:family="text">
      <style:text-properties officeooo:rsid="01bb6af6"/>
    </style:style>
    <style:style style:name="T233" style:family="text">
      <style:text-properties officeooo:rsid="0266c36e"/>
    </style:style>
    <style:style style:name="T234" style:family="text">
      <style:text-properties officeooo:rsid="0033b754"/>
    </style:style>
    <style:style style:name="T235" style:family="text">
      <style:text-properties officeooo:rsid="00495cf7"/>
    </style:style>
    <style:style style:name="T236" style:family="text">
      <style:text-properties officeooo:rsid="025c4999"/>
    </style:style>
    <style:style style:name="T237" style:family="text">
      <style:text-properties officeooo:rsid="003f2cdf"/>
    </style:style>
    <style:style style:name="T238" style:family="text">
      <style:text-properties officeooo:rsid="0054c922"/>
    </style:style>
    <style:style style:name="T239" style:family="text">
      <style:text-properties fo:language="fr" fo:country="FR" officeooo:rsid="003f2cdf"/>
    </style:style>
    <style:style style:name="T240" style:family="text">
      <style:text-properties fo:language="fr" fo:country="FR" officeooo:rsid="01064640"/>
    </style:style>
    <style:style style:name="T241" style:family="text">
      <style:text-properties fo:language="fr" fo:country="FR" officeooo:rsid="01064cef"/>
    </style:style>
    <style:style style:name="T242" style:family="text">
      <style:text-properties fo:language="fr" fo:country="FR" officeooo:rsid="010e897e"/>
    </style:style>
    <style:style style:name="T243" style:family="text">
      <style:text-properties fo:language="fr" fo:country="FR" officeooo:rsid="018d22c2"/>
    </style:style>
    <style:style style:name="T244" style:family="text">
      <style:text-properties officeooo:rsid="00408e28"/>
    </style:style>
    <style:style style:name="T245" style:family="text">
      <style:text-properties officeooo:rsid="018edea0"/>
    </style:style>
    <style:style style:name="T246" style:family="text">
      <style:text-properties officeooo:rsid="01bce56d"/>
    </style:style>
    <style:style style:name="T247" style:family="text">
      <style:text-properties style:text-underline-style="none" fo:font-weight="normal" officeooo:rsid="003f2cdf" style:font-weight-asian="normal" style:font-weight-complex="normal"/>
    </style:style>
    <style:style style:name="T248" style:family="text">
      <style:text-properties style:text-underline-style="none" fo:font-weight="normal" officeooo:rsid="0048588b" style:font-weight-asian="normal" style:font-weight-complex="normal"/>
    </style:style>
    <style:style style:name="T249" style:family="text">
      <style:text-properties style:text-underline-style="none" fo:font-weight="normal" officeooo:rsid="01b4d881" style:font-weight-asian="normal" style:font-weight-complex="normal"/>
    </style:style>
    <style:style style:name="T250" style:family="text">
      <style:text-properties style:text-underline-style="none" fo:font-weight="normal" officeooo:rsid="00c3aecf" style:font-weight-asian="normal" style:font-weight-complex="normal"/>
    </style:style>
    <style:style style:name="T251" style:family="text">
      <style:text-properties style:text-underline-style="none" fo:font-weight="normal" officeooo:rsid="004265de" style:font-weight-asian="normal" style:font-weight-complex="normal"/>
    </style:style>
    <style:style style:name="T252" style:family="text">
      <style:text-properties style:text-underline-style="none" fo:font-weight="normal" officeooo:rsid="01077b0d" style:font-weight-asian="normal" style:font-weight-complex="normal"/>
    </style:style>
    <style:style style:name="T253" style:family="text">
      <style:text-properties officeooo:rsid="01b4d881"/>
    </style:style>
    <style:style style:name="T254" style:family="text">
      <style:text-properties fo:language="fr" fo:country="FR" style:text-underline-style="none" fo:font-weight="normal" officeooo:rsid="0048588b" style:font-weight-asian="normal" style:font-weight-complex="normal"/>
    </style:style>
    <style:style style:name="T255" style:family="text">
      <style:text-properties fo:language="fr" fo:country="FR" officeooo:rsid="009160e4"/>
    </style:style>
    <style:style style:name="T256" style:family="text">
      <style:text-properties fo:language="fr" fo:country="FR" style:text-underline-style="none" fo:font-weight="normal" officeooo:rsid="009160e4" style:font-weight-asian="normal" style:font-weight-complex="normal"/>
    </style:style>
    <style:style style:name="T257" style:family="text">
      <style:text-properties fo:language="fr" fo:country="FR" style:text-underline-style="none" fo:font-weight="normal" officeooo:rsid="0091c7ca" style:font-weight-asian="normal" style:font-weight-complex="normal"/>
    </style:style>
    <style:style style:name="T258" style:family="text">
      <style:text-properties fo:language="fr" fo:country="FR" style:text-underline-style="none" fo:font-weight="normal" officeooo:rsid="0179ec06" style:font-weight-asian="normal" style:font-weight-complex="normal"/>
    </style:style>
    <style:style style:name="T259" style:family="text">
      <style:text-properties fo:language="fr" fo:country="FR" style:text-underline-style="none" fo:font-weight="normal" officeooo:rsid="009375a1" style:font-weight-asian="normal" style:font-weight-complex="normal"/>
    </style:style>
    <style:style style:name="T260" style:family="text">
      <style:text-properties style:text-underline-style="solid" style:text-underline-width="auto" style:text-underline-color="font-color" fo:font-weight="bold" officeooo:rsid="0069bf90" style:font-weight-asian="bold" style:font-weight-complex="bold"/>
    </style:style>
    <style:style style:name="T261" style:family="text">
      <style:text-properties style:text-underline-style="solid" style:text-underline-width="auto" style:text-underline-color="font-color" fo:font-weight="bold" officeooo:rsid="003f2cdf" style:font-weight-asian="bold" style:font-weight-complex="bold"/>
    </style:style>
    <style:style style:name="T262" style:family="text">
      <style:text-properties style:text-underline-style="none" fo:font-weight="normal" officeooo:rsid="0069bf90" style:font-weight-asian="normal" style:font-weight-complex="normal"/>
    </style:style>
    <style:style style:name="T263" style:family="text">
      <style:text-properties style:text-underline-style="none" fo:font-weight="bold" officeooo:rsid="0069bf90" style:font-weight-asian="bold" style:font-weight-complex="bold"/>
    </style:style>
    <style:style style:name="T264" style:family="text">
      <style:text-properties style:text-underline-style="none" fo:font-weight="normal" officeooo:rsid="01d53ef4" style:font-weight-asian="normal" style:font-weight-complex="normal"/>
    </style:style>
    <style:style style:name="T265" style:family="text">
      <style:text-properties style:text-underline-style="none" fo:font-weight="normal" officeooo:rsid="006db94c" style:font-weight-asian="normal" style:font-weight-complex="normal"/>
    </style:style>
    <style:style style:name="T266" style:family="text">
      <style:text-properties style:text-underline-style="none" fo:font-weight="normal" officeooo:rsid="00a7e754" style:font-weight-asian="normal" style:font-weight-complex="normal"/>
    </style:style>
    <style:style style:name="T267" style:family="text">
      <style:text-properties style:text-underline-style="none" fo:font-weight="normal" officeooo:rsid="00710b8f" style:font-weight-asian="normal" style:font-weight-complex="normal"/>
    </style:style>
    <style:style style:name="T268" style:family="text">
      <style:text-properties style:text-underline-style="none" fo:font-weight="normal" officeooo:rsid="007b607e" style:font-weight-asian="normal" style:font-weight-complex="normal"/>
    </style:style>
    <style:style style:name="T269" style:family="text">
      <style:text-properties fo:font-style="normal" style:text-underline-style="none" fo:font-weight="normal" officeooo:rsid="00710b8f" style:font-style-asian="normal" style:font-weight-asian="normal" style:font-style-complex="normal" style:font-weight-complex="normal"/>
    </style:style>
    <style:style style:name="T270" style:family="text">
      <style:text-properties fo:font-style="normal" style:text-underline-style="none" fo:font-weight="normal" officeooo:rsid="0179ec06" style:font-style-asian="normal" style:font-weight-asian="normal" style:font-style-complex="normal" style:font-weight-complex="normal"/>
    </style:style>
    <style:style style:name="T271" style:family="text">
      <style:text-properties fo:language="fr" fo:country="FR" fo:font-style="normal" officeooo:rsid="00710b8f" style:font-style-asian="normal" style:font-style-complex="normal"/>
    </style:style>
    <style:style style:name="T272" style:family="text">
      <style:text-properties fo:language="fr" fo:country="FR" fo:font-style="normal" officeooo:rsid="0179ec06" style:font-style-asian="normal" style:font-style-complex="normal"/>
    </style:style>
    <style:style style:name="T273" style:family="text">
      <style:text-properties officeooo:rsid="0058505f"/>
    </style:style>
    <style:style style:name="T274" style:family="text">
      <style:text-properties fo:language="fr" fo:country="FR" officeooo:rsid="0058505f"/>
    </style:style>
    <style:style style:name="T275" style:family="text">
      <style:text-properties fo:language="fr" fo:country="FR" officeooo:rsid="0058c09a"/>
    </style:style>
    <style:style style:name="T276" style:family="text">
      <style:text-properties fo:language="fr" fo:country="FR" officeooo:rsid="0069bf90"/>
    </style:style>
    <style:style style:name="T277" style:family="text">
      <style:text-properties fo:language="fr" fo:country="FR" officeooo:rsid="00dc378e"/>
    </style:style>
    <style:style style:name="T278" style:family="text">
      <style:text-properties fo:language="fr" fo:country="FR" officeooo:rsid="0266c36e"/>
    </style:style>
    <style:style style:name="T279" style:family="text">
      <style:text-properties officeooo:rsid="0058c09a"/>
    </style:style>
    <style:style style:name="T280" style:family="text">
      <style:text-properties officeooo:rsid="01a0a371"/>
    </style:style>
    <style:style style:name="T281" style:family="text">
      <style:text-properties style:text-underline-style="none" fo:font-weight="normal" officeooo:rsid="025ae6ef" style:font-weight-asian="normal" style:font-weight-complex="normal"/>
    </style:style>
    <style:style style:name="T282" style:family="text">
      <style:text-properties style:text-underline-style="none" fo:font-weight="normal" officeooo:rsid="00dc378e" style:font-weight-asian="normal" style:font-weight-complex="normal"/>
    </style:style>
    <style:style style:name="T283" style:family="text">
      <style:text-properties style:text-underline-style="none" fo:font-weight="normal" officeooo:rsid="025c4999" style:font-weight-asian="normal" style:font-weight-complex="normal"/>
    </style:style>
    <style:style style:name="T284" style:family="text">
      <style:text-properties style:text-underline-style="none" fo:font-weight="normal" officeooo:rsid="0058c09a" style:font-weight-asian="normal" style:font-weight-complex="normal"/>
    </style:style>
    <style:style style:name="T285" style:family="text">
      <style:text-properties style:text-underline-style="solid" style:text-underline-width="auto" style:text-underline-color="font-color" fo:font-weight="normal" officeooo:rsid="0058c09a" style:font-weight-asian="normal" style:font-weight-complex="normal"/>
    </style:style>
    <style:style style:name="T286" style:family="text">
      <style:text-properties style:text-underline-style="solid" style:text-underline-width="auto" style:text-underline-color="font-color" fo:font-weight="normal" officeooo:rsid="01d4c6ca" style:font-weight-asian="normal" style:font-weight-complex="normal"/>
    </style:style>
    <style:style style:name="T287" style:family="text">
      <style:text-properties style:text-underline-style="none" fo:font-weight="normal" officeooo:rsid="0058d1fe" style:font-weight-asian="normal" style:font-weight-complex="normal"/>
    </style:style>
    <style:style style:name="T288" style:family="text">
      <style:text-properties style:text-underline-style="solid" style:text-underline-width="auto" style:text-underline-color="font-color" fo:font-weight="bold" officeooo:rsid="0058c09a" style:font-weight-asian="bold" style:font-weight-complex="bold"/>
    </style:style>
    <style:style style:name="T289" style:family="text">
      <style:text-properties style:text-underline-style="solid" style:text-underline-width="auto" style:text-underline-color="font-color" officeooo:rsid="0058c09a"/>
    </style:style>
    <style:style style:name="T290" style:family="text">
      <style:text-properties officeooo:rsid="0069bf90"/>
    </style:style>
    <style:style style:name="T291" style:family="text">
      <style:text-properties officeooo:rsid="00dc378e"/>
    </style:style>
    <style:style style:name="T292" style:family="text">
      <style:text-properties officeooo:rsid="019f6798"/>
    </style:style>
    <style:style style:name="T293" style:family="text">
      <style:text-properties style:text-underline-style="none" fo:font-weight="normal" officeooo:rsid="00c4cfb5" style:font-weight-asian="normal" style:font-weight-complex="normal"/>
    </style:style>
    <style:style style:name="T294" style:family="text">
      <style:text-properties style:text-underline-style="none" fo:font-weight="normal" officeooo:rsid="018d22c2" style:font-weight-asian="normal" style:font-weight-complex="normal"/>
    </style:style>
    <style:style style:name="T295" style:family="text">
      <style:text-properties style:text-underline-style="none" fo:font-weight="normal" officeooo:rsid="01be991e" style:font-weight-asian="normal" style:font-weight-complex="normal"/>
    </style:style>
    <style:style style:name="T296" style:family="text">
      <style:text-properties officeooo:rsid="01dd6602"/>
    </style:style>
    <style:style style:name="T297" style:family="text">
      <style:text-properties officeooo:rsid="01ed3add"/>
    </style:style>
    <style:style style:name="T298" style:family="text">
      <style:text-properties officeooo:rsid="01fc443c"/>
    </style:style>
    <style:style style:name="T299" style:family="text">
      <style:text-properties officeooo:rsid="01e1a6b6"/>
    </style:style>
    <style:style style:name="T300" style:family="text">
      <style:text-properties officeooo:rsid="01e1f56a"/>
    </style:style>
    <style:style style:name="T301" style:family="text">
      <style:text-properties officeooo:rsid="01e9a570"/>
    </style:style>
    <style:style style:name="T302" style:family="text">
      <style:text-properties officeooo:rsid="01e609a3"/>
    </style:style>
    <style:style style:name="T303" style:family="text">
      <style:text-properties officeooo:rsid="01e397e6"/>
    </style:style>
    <style:style style:name="T304" style:family="text">
      <style:text-properties officeooo:rsid="01e2d0a6"/>
    </style:style>
    <style:style style:name="T305" style:family="text">
      <style:text-properties officeooo:rsid="01e056df"/>
    </style:style>
    <style:style style:name="T306" style:family="text">
      <style:text-properties officeooo:rsid="01e07555"/>
    </style:style>
    <style:style style:name="T307" style:family="text">
      <style:text-properties officeooo:rsid="0206c787"/>
    </style:style>
    <style:style style:name="T308" style:family="text">
      <style:text-properties officeooo:rsid="021090e9"/>
    </style:style>
    <style:style style:name="T309" style:family="text">
      <style:text-properties officeooo:rsid="0223bf7c"/>
    </style:style>
    <style:style style:name="T310" style:family="text">
      <style:text-properties officeooo:rsid="01fe986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Documentation Utilisateur BertheVario<text:span text:style-name="T1">213</text:span></text:p>
      <text:p text:style-name="P1"/>
      <text:p text:style-name="P1"/>
      <text:p text:style-name="P3">Projet d’<text:span text:style-name="T2">alti vario gps parapente</text:span></text:p>
      <text:p text:style-name="P3"/>
      <text:p text:style-name="P4">à base de </text:p>
      <text:p text:style-name="P4"/>
      <text:p text:style-name="P5"><text:span text:style-name="T3">LILYGO T5 v2.3.1 </text:span><text:span text:style-name="T4">DEPG0213BN</text:span><text:span text:style-name="T3"> 9102 chip</text:span></text:p>
      <text:p text:style-name="P3"/>
      <text:p text:style-name="P3"/>
      <text:p text:style-name="P6"><text:span text:style-name="T5">V</text:span><text:span text:style-name="T6">ersion 202</text:span><text:span text:style-name="T7">60</text:span><text:span text:style-name="T8">611</text:span><text:span text:style-name="T7">a</text:span></text:p>
      <text:p text:style-name="P6"><text:span text:style-name="T6"/></text:p>
      <text:p text:style-name="P6"><text:span text:style-name="T6"/></text:p>
      <text:p text:style-name="P7">https://github.com/gitberthe/BertheVario</text:p>
      <text:p text:style-name="P3"/>
      <text:p text:style-name="P3"/>
      <text:p text:style-name="P3"/>
      <text:p text:style-name="P8">Compilé avec Visual Studio Code / <text:span text:style-name="T9">PlatformIO</text:span></text:p>
      <text:p text:style-name="P9"/>
      <text:p text:style-name="P9"/>
      <text:p text:style-name="P10">Espressif Systems </text:p>
      <text:p text:style-name="P8"><text:span text:style-name="T10">ESP32 </text:span><text:span text:style-name="T11">Dev Module</text:span></text:p>
      <text:p text:style-name="P8">ESP32-D0WDQ6-V3</text:p>
      <text:p text:style-name="P11">écran 2.13inch DEPG0213BN</text:p>
      <text:p text:style-name="P12">Arduino</text:p>
      <text:p text:style-name="P8"/>
      <text:p text:style-name="P8"><text:s/>langage C++.</text:p>
      <text:p text:style-name="P8"/>
      <text:p text:style-name="P8"/>
      <text:p text:style-name="P13"><text:span text:style-name="T12">git</text:span>berthe@gmail.com</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4">Table des matières</text:p>
          </text:index-title>
          <text:p text:style-name="P15"><text:a xlink:type="simple" xlink:href="#__RefHeading___Toc4248_2919898572" office:name="Écran de boot :" text:style-name="Index_20_Link" text:visited-style-name="Index_20_Link">1 Écran de boot :<text:tab/>4</text:a></text:p>
          <text:p text:style-name="P15"><text:a xlink:type="simple" xlink:href="#__RefHeading___Toc4250_2919898572" office:name="Démarrage :" text:style-name="Index_20_Link" text:visited-style-name="Index_20_Link">2 Démarrage :<text:tab/>5</text:a></text:p>
          <text:p text:style-name="P15"><text:a xlink:type="simple" xlink:href="#__RefHeading___Toc4252_2919898572" office:name="Écran Vz :" text:style-name="Index_20_Link" text:visited-style-name="Index_20_Link">3 Écran Vz :<text:tab/>6</text:a></text:p>
          <text:p text:style-name="P15"><text:a xlink:type="simple" xlink:href="#__RefHeading___Toc4256_2919898572" office:name="Écran Histo:" text:style-name="Index_20_Link" text:visited-style-name="Index_20_Link">4 Écran Histo:<text:tab/>9</text:a></text:p>
          <text:p text:style-name="P15"><text:a xlink:type="simple" xlink:href="#__RefHeading___Toc4258_2919898572" office:name="Écran Affichage / Archivage IGC :" text:style-name="Index_20_Link" text:visited-style-name="Index_20_Link">5 Écran Affichage / Archivage IGC :<text:tab/>11</text:a></text:p>
          <text:p text:style-name="P15"><text:a xlink:type="simple" xlink:href="#__RefHeading___Toc4260_2919898572" office:name="Écran Zone Aériennes / Modification :" text:style-name="Index_20_Link" text:visited-style-name="Index_20_Link">6 Écran Zone Aériennes / Modification :<text:tab/>13</text:a></text:p>
          <text:p text:style-name="P15"><text:a xlink:type="simple" xlink:href="#__RefHeading___Toc4262_2919898572" office:name="Écran Éditeur Configuration:" text:style-name="Index_20_Link" text:visited-style-name="Index_20_Link">7 Écran Éditeur Configuration:<text:tab/>17</text:a></text:p>
          <text:p text:style-name="P15"><text:a xlink:type="simple" xlink:href="#__RefHeading___Toc4264_2919898572" office:name="Écran Tma Dessous:" text:style-name="Index_20_Link" text:visited-style-name="Index_20_Link">8 Écran Tma Dessous:<text:tab/>17</text:a></text:p>
          <text:p text:style-name="P15"><text:a xlink:type="simple" xlink:href="#__RefHeading___Toc4266_2919898572" office:name="Écran Système :" text:style-name="Index_20_Link" text:visited-style-name="Index_20_Link">9 Écran Système :<text:tab/>18</text:a></text:p>
          <text:p text:style-name="P15"><text:a xlink:type="simple" xlink:href="#__RefHeading___Toc4268_2919898572" office:name="Fichier de configuration SDCard/config/config.txt :" text:style-name="Index_20_Link" text:visited-style-name="Index_20_Link">10 Fichier de configuration SDCard/config/config.txt :<text:tab/>19</text:a></text:p>
          <text:p text:style-name="P15"><text:a xlink:type="simple" xlink:href="#__RefHeading___Toc4270_2919898572" office:name="Fichier de terrains connus SDCard/config/terconnu.txt :" text:style-name="Index_20_Link" text:visited-style-name="Index_20_Link">11 Fichier de terrains connus SDCard/config/terconnu.txt :<text:tab/>21</text:a></text:p>
          <text:p text:style-name="P15"><text:a xlink:type="simple" xlink:href="#__RefHeading___Toc4272_2919898572" office:name="Fichier de calibration SDCard/config/calmag.txt :" text:style-name="Index_20_Link" text:visited-style-name="Index_20_Link">12 Fichier de calibration SDCard/config/calmag.txt :<text:tab/>22</text:a></text:p>
          <text:p text:style-name="P15"><text:a xlink:type="simple" xlink:href="#__RefHeading___Toc4274_2919898572" office:name="Fichier d’historique de vol SDCard/config/histovol.txt :" text:style-name="Index_20_Link" text:visited-style-name="Index_20_Link">13 Fichier d’historique de vol SDCard/config/histovol.txt :<text:tab/>22</text:a></text:p>
          <text:p text:style-name="P15"><text:a xlink:type="simple" xlink:href="#__RefHeading___Toc4276_2919898572" office:name="Fichier IGC :" text:style-name="Index_20_Link" text:visited-style-name="Index_20_Link">14 Fichier IGC :<text:tab/>22</text:a></text:p>
          <text:p text:style-name="P15"><text:a xlink:type="simple" xlink:href="#__RefHeading___Toc4278_2919898572" office:name="Carte SD :" text:style-name="Index_20_Link" text:visited-style-name="Index_20_Link">15 Carte SD :<text:tab/>22</text:a></text:p>
          <text:p text:style-name="P15"><text:a xlink:type="simple" xlink:href="#__RefHeading___Toc4280_2919898572" office:name="Rechargement du GnuVario :" text:style-name="Index_20_Link" text:visited-style-name="Index_20_Link">16 Rechargement du GnuVario :<text:tab/>23</text:a></text:p>
          <text:p text:style-name="P15"><text:a xlink:type="simple" xlink:href="#__RefHeading___Toc4282_2919898572" office:name="Le Gps :" text:style-name="Index_20_Link" text:visited-style-name="Index_20_Link">17 Le Gps :<text:tab/>23</text:a></text:p>
          <text:p text:style-name="P15"><text:a xlink:type="simple" xlink:href="#__RefHeading___Toc4284_2919898572" office:name="Les zones aériennes et le fichier SDCard/config/zonesaer.txt :" text:style-name="Index_20_Link" text:visited-style-name="Index_20_Link">18 Les zones aériennes et le fichier SDCard/config/zonesaer.txt :<text:tab/>23</text:a></text:p>
          <text:p text:style-name="P15"><text:a xlink:type="simple" xlink:href="#__RefHeading___Toc4286_2919898572" office:name="Pour les développeur :" text:style-name="Index_20_Link" text:visited-style-name="Index_20_Link">19 Pour les développeur :<text:tab/>25</text:a></text:p>
          <text:p text:style-name="P15"><text:a xlink:type="simple" xlink:href="#__RefHeading___Toc4286_2919898572%20Copie%201" office:name="Le mode randonnée pour ne plus se perdre :" text:style-name="Index_20_Link" text:visited-style-name="Index_20_Link">20 Le mode randonnée pour ne plus se perdre :<text:tab/>26</text:a></text:p>
        </text:index-body>
      </text:table-of-content>
      <text:p text:style-name="P16"/>
      <text:p text:style-name="P17">Modifications ap<text:span text:style-name="T13">p</text:span>orté<text:span text:style-name="T13">e</text:span><text:span text:style-name="T14">s</text:span> à la <text:span text:style-name="T14">d</text:span>ocumentation :</text:p>
      <text:p text:style-name="P16"/>
      <text:p text:style-name="P18">20260<text:span text:style-name="T15">611</text:span>a : <text:span text:style-name="T15">Changement de gestionnaire de fichier</text:span>.</text:p>
      <text:p text:style-name="P19">20260219a : Modification Ihm.</text:p>
      <text:p text:style-name="P20">202<text:span text:style-name="T16">5</text:span><text:span text:style-name="T17">0</text:span><text:span text:style-name="T18">3</text:span><text:span text:style-name="T19">22</text:span><text:span text:style-name="T20">b</text:span><text:span text:style-name="T17">: </text:span><text:span text:style-name="T20">Chapitre 21 mode randonnée.</text:span></text:p>
      <text:p text:style-name="P20">202<text:span text:style-name="T16">5</text:span><text:span text:style-name="T17">0</text:span><text:span text:style-name="T18">3</text:span><text:span text:style-name="T19">22</text:span><text:span text:style-name="T21">a</text:span><text:span text:style-name="T17">: </text:span><text:span text:style-name="T19">Création documentation utilisateur d’après BertheVario</text:span><text:span text:style-name="T22">.</text:span></text:p>
      <text:p text:style-name="P21"/>
      <text:h text:style-name="P22" text:outline-level="1"><text:bookmark-start text:name="__RefHeading___Toc4248_2919898572"/>Écran <text:span text:style-name="T23">de boot</text:span> :<text:bookmark-end text:name="__RefHeading___Toc4248_2919898572"/></text:h>
      <text:p text:style-name="P23">A l’écran de boot, il y a <text:span text:style-name="T24">possibilité de changer de mode (voir boutons plus bas). Puis il y</text:span> <text:span text:style-name="T24">a </text:span>affichage de la tension de batterie, <text:span text:style-name="T25">du pourcentage batterie</text:span> et du numéro de firmware.</text:p>
      <text:p text:style-name="P23">Une batterie à 4,<text:span text:style-name="T25">3</text:span>v est chargée, à 3,7v vide.</text:p>
      <text:p text:style-name="P23">Initialisation du hardware : 1 beep, à la mise sous tension.</text:p>
      <text:p text:style-name="P23"><text:span text:style-name="T26">Remarque 1 </text:span>: <text:span text:style-name="T24">e</text:span>n mode connexion wifi, les identifiants <text:span text:style-name="T24">sont ceux </text:span>stockés sur la carte <text:span text:style-name="T27">SD dans le</text:span> fichier /<text:span text:style-name="T28">config/</text:span>config.txt.</text:p>
      <text:p text:style-name="P24"><text:span text:style-name="T29">En mode connexion wifi, il suffit de taper dans un navigateur web </text:span><text:a xlink:type="simple" xlink:href="http://x.x.x.x/" text:style-name="Internet_20_link" text:visited-style-name="Visited_20_Internet_20_Link"><text:span text:style-name="T29">http://x.x.x.</text:span><text:span text:style-name="T30">x/</text:span><text:span text:style-name="T31">file</text:span></text:a><text:span text:style-name="T29"> </text:span><text:span text:style-name="T32">(adresse IP données par l’écran) </text:span><text:span text:style-name="T29">pour avoir acc</text:span><text:span text:style-name="T33">è</text:span><text:span text:style-name="T29">s </text:span><text:span text:style-name="T32">à</text:span><text:span text:style-name="T29"> la page téléchargement si dessous (acc</text:span><text:span text:style-name="T33">è</text:span><text:span text:style-name="T29">s </text:span><text:span text:style-name="T32">au </text:span><text:span text:style-name="T29">fichiers IGC </text:span><text:span text:style-name="T32">par clic sur le lien, </text:span><text:span text:style-name="T30">éditer, renommer. détruire, prévisualiser.</text:span><text:span text:style-name="T29">)</text:span></text:p>
      <text:p text:style-name="P25"><draw:frame draw:style-name="fr1" draw:name="Image2" text:anchor-type="char" svg:width="17.59cm" svg:height="6.068cm" draw:z-index="50"><draw:image xlink:href="Pictures/100000010000081C000002CA8BC65E06.png" xlink:type="simple" xlink:show="embed" xlink:actuate="onLoad" draw:mime-type="image/png"/></draw:frame></text:p>
      <text:p text:style-name="P23"><text:span text:style-name="T26">Remarque 2 </text:span>: <text:span text:style-name="T24">En mode</text:span> calibration du capteur magnétique. Il faut faire des 8 avec le <text:span text:style-name="T19">Berthe</text:span>Vario<text:span text:style-name="T19">213</text:span> jusqu’<text:span text:style-name="T34">à</text:span> re-démar<text:span text:style-name="T35">r</text:span>age <text:span text:style-name="T24">(maximum de directions possible dans le sens du cap magnétique)</text:span>.</text:p>
      <text:p text:style-name="P23">Il y a mise a jour du fichier /<text:span text:style-name="T28">config/</text:span>calmag.txt sur la carte SD qui est nécessaire au bon fonctionnement du cap<text:span text:style-name="T34">teur</text:span> magnétique.</text:p>
      <text:p text:style-name="P26">Bien sur, faire des 8 en position à plat ou vertical<text:span text:style-name="T36">e</text:span> suivant la configuration firmware “<text:span text:style-name="T37">à</text:span> plat” “ou “suspente gauche ou droite”.</text:p>
      <text:p text:style-name="P26"/>
      <text:p text:style-name="P23"><text:span text:style-name="T26">Remarque 3 </text:span>: <text:span text:style-name="T38">Dans les pages ihm du milieux</text:span>, <text:span text:style-name="T38">si o</text:span>n appuie sur le bouton gauche et droit, mais pas sur le bouton centrale, il y a alors reboot du <text:span text:style-name="T19">Berthe</text:span>Vario<text:span text:style-name="T19">213</text:span>.</text:p>
      <text:p text:style-name="P27">Boutons :</text:p>
      <text:p text:style-name="P28">Gauche : mode calibration.</text:p>
      <text:p text:style-name="P28"><text:soft-page-break/>Central : mode wifi.</text:p>
      <text:p text:style-name="P28">Droit : mode rando-vol. <text:span text:style-name="T38">Ou verification cheksum des *.hgt si appuy multiple.</text:span></text:p>
      <text:p text:style-name="P28">Gauche et droit : reboot.</text:p>
      <text:h text:style-name="P29" text:outline-level="1"><text:bookmark-start text:name="__RefHeading___Toc4250_2919898572"/>Démarr<text:span text:style-name="T39">a</text:span>ge :<text:bookmark-end text:name="__RefHeading___Toc4250_2919898572"/></text:h>
      <text:p text:style-name="P30">Après le boot et l’initialisation du hardware, il y a démarrage du logiciel <text:span text:style-name="T40">et 2 beep</text:span>. S’il y a <text:span text:style-name="T41">4</text:span> beep, c’est qu’il y a un problème de carte SD. Puis <text:span text:style-name="T42">il y </text:span><text:span text:style-name="T27">a</text:span><text:span text:style-name="T42"> </text:span>affichage de l’écran 0 <text:span text:style-name="T43">Vz</text:span>.</text:p>
      <text:h text:style-name="P22" text:outline-level="1"><text:bookmark-start text:name="__RefHeading___Toc4252_2919898572"/>Écran <text:span text:style-name="T44">Vz </text:span>:<text:bookmark-end text:name="__RefHeading___Toc4252_2919898572"/></text:h>
      <text:p text:style-name="Text_20_body"><text:span text:style-name="T29"/></text:p>
      <text:p text:style-name="P31"><draw:frame text:anchor-type="paragraph" draw:z-index="11" draw:name="Cadre de texte 1" draw:style-name="gr1" draw:text-style-name="P32" svg:width="4.261cm" svg:height="1.22cm" svg:x="5.773cm" svg:y="0.182cm"><draw:text-box><text:p><text:span text:style-name="T45">Cap </text:span><text:span text:style-name="T45">Magnétique </text:span></text:p><text:p><text:span text:style-name="T45">à plat</text:span></text:p></draw:text-box></draw:frame><draw:frame text:anchor-type="paragraph" draw:z-index="22" draw:name="Cadre de texte 15" draw:style-name="gr1" draw:text-style-name="P32" svg:width="2.719cm" svg:height="1.22cm" svg:x="-0.129cm" svg:y="0.206cm"><draw:text-box><text:p><text:span text:style-name="T45">Nom terrain </text:span><text:span text:style-name="T45">et finesse</text:span></text:p></draw:text-box></draw:frame><draw:frame text:anchor-type="paragraph" draw:z-index="20" draw:name="Cadre de texte 10" draw:style-name="gr1" draw:text-style-name="P32" svg:width="2.719cm" svg:height="1.22cm" svg:x="15.177cm" svg:y="0.113cm"><draw:text-box><text:p><text:span text:style-name="T45">Temps de </text:span><text:span text:style-name="T45">vol</text:span></text:p></draw:text-box></draw:frame><draw:line text:anchor-type="paragraph" draw:z-index="48" draw:name="Ligne 7" draw:style-name="gr2" draw:text-style-name="P33" svg:x1="8.13cm" svg:y1="9.906cm" svg:x2="12.198cm" svg:y2="-0.277cm"><text:p/></draw:line><draw:frame text:anchor-type="paragraph" draw:z-index="49" draw:name="Cadre de texte 11" draw:style-name="gr1" draw:text-style-name="P32" svg:width="2.719cm" svg:height="1.22cm" svg:x="12.176cm" svg:y="-1.887cm"><draw:text-box><text:p><text:span text:style-name="T45">Tension </text:span><text:span text:style-name="T45">batterie</text:span></text:p></draw:text-box></draw:frame></text:p>
      <text:p text:style-name="P31"><draw:line text:anchor-type="paragraph" draw:z-index="8" draw:name="Ligne 10" draw:style-name="gr3" draw:text-style-name="P34" svg:x1="8.319cm" svg:y1="-0.222cm" svg:x2="8.319cm" svg:y2="1.156cm"><text:p/></draw:line></text:p>
      <text:p text:style-name="P31"><draw:line text:anchor-type="paragraph" draw:z-index="21" draw:name="Ligne 15" draw:style-name="gr2" draw:text-style-name="P34" svg:x1="7.805cm" svg:y1="7.449cm" svg:x2="2.323cm" svg:y2="-0.236cm"><text:p/></draw:line><draw:line text:anchor-type="paragraph" draw:z-index="5" draw:name="Ligne 5" draw:style-name="gr2" draw:text-style-name="P34" svg:x1="9.13cm" svg:y1="8.245cm" svg:x2="14.856cm" svg:y2="-0.222cm"><text:p/></draw:line><draw:frame draw:style-name="fr2" draw:name="Image1" text:anchor-type="char" svg:x="2.693cm" svg:y="0.362cm" svg:width="12.841cm" svg:height="17.12cm" draw:z-index="1"><draw:image xlink:href="Pictures/10000000000001E400000287CFF58636.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draw:frame text:anchor-type="paragraph" draw:z-index="13" draw:name="Cadre de texte 3" draw:style-name="gr4" draw:text-style-name="P32" svg:width="2.719cm" svg:height="0.814cm" svg:x="16.154cm" svg:y="-0.24cm"><draw:text-box><text:p><text:span text:style-name="T45">Cap Sol/Gps</text:span></text:p></draw:text-box></draw:frame><draw:line text:anchor-type="paragraph" draw:z-index="27" draw:name="Ligne 18" draw:style-name="gr2" draw:text-style-name="P34" svg:x1="9.721cm" svg:y1="1.775cm" svg:x2="15.939cm" svg:y2="0.406cm"><text:p/></draw:line></text:p>
      <text:p text:style-name="P31"><draw:frame text:anchor-type="paragraph" draw:z-index="12" draw:name="Cadre de texte 2" draw:style-name="gr4" draw:text-style-name="P32" svg:width="2.719cm" svg:height="0.814cm" svg:x="-1.247cm" svg:y="0.131cm"><draw:text-box><text:p><text:span text:style-name="T45">Dérive Sol</text:span></text:p></draw:text-box></draw:frame></text:p>
      <text:p text:style-name="P31"><draw:line text:anchor-type="paragraph" draw:z-index="10" draw:name="Ligne 8" draw:style-name="gr5" draw:text-style-name="P35" svg:x1="7.35cm" svg:y1="0.237cm" svg:x2="2.228cm" svg:y2="-0.342cm"><text:p/></draw:line></text:p>
      <text:p text:style-name="P31"><draw:frame text:anchor-type="paragraph" draw:z-index="19" draw:name="Cadre de texte 9" draw:style-name="gr6" draw:text-style-name="P32" svg:width="2.719cm" svg:height="1.828cm" svg:x="-1.431cm" svg:y="-0.099cm"><draw:text-box><text:p><text:span text:style-name="T45">Vitesse verticale / finesse sol</text:span></text:p></draw:text-box></draw:frame></text:p>
      <text:p text:style-name="P31"><draw:line text:anchor-type="paragraph" draw:z-index="7" draw:name="Ligne 9" draw:style-name="gr2" draw:text-style-name="P34" svg:x1="7.485cm" svg:y1="-0.28cm" svg:x2="1.288cm" svg:y2="-0.224cm"><text:p/></draw:line></text:p>
      <text:p text:style-name="P31"><draw:line text:anchor-type="paragraph" draw:z-index="9" draw:name="Ligne 11" draw:style-name="gr2" draw:text-style-name="P34" svg:x1="7.747cm" svg:y1="0.453cm" svg:x2="1.157cm" svg:y2="0.774cm"><text:p/></draw:line><draw:line text:anchor-type="paragraph" draw:z-index="6" draw:name="Ligne 6" draw:style-name="gr2" draw:text-style-name="P34" svg:x1="9.745cm" svg:y1="-0.344cm" svg:x2="16.009cm" svg:y2="2.097cm"><text:p/></draw:line></text:p>
      <text:p text:style-name="P31"><draw:frame text:anchor-type="paragraph" draw:z-index="18" draw:name="Cadre de texte 8" draw:style-name="gr1" draw:text-style-name="P32" svg:width="2.719cm" svg:height="1.22cm" svg:x="-0.245cm" svg:y="-0.056cm"><draw:text-box><text:p><text:span text:style-name="T45">Altitude/Hauteur sol</text:span></text:p></draw:text-box></draw:frame></text:p>
      <text:p text:style-name="P31"><draw:line text:anchor-type="paragraph" draw:z-index="4" draw:name="Ligne 3" draw:style-name="gr7" draw:text-style-name="P34" svg:x1="9.733cm" svg:y1="-0.083cm" svg:x2="11.56cm" svg:y2="4.942cm"><text:p/></draw:line><draw:line text:anchor-type="paragraph" draw:z-index="3" draw:name="Ligne 2" draw:style-name="gr7" draw:text-style-name="P34" svg:x1="8.385cm" svg:y1="0.099cm" svg:x2="6.618cm" svg:y2="4.609cm"><text:p/></draw:line><draw:line text:anchor-type="paragraph" draw:z-index="2" draw:name="Ligne 1" draw:style-name="gr7" draw:text-style-name="P34" svg:x1="6.837cm" svg:y1="0.099cm" svg:x2="1.939cm" svg:y2="4.428cm"><text:p/></draw:line></text:p>
      <text:p text:style-name="P36"><draw:frame text:anchor-type="paragraph" draw:z-index="14" draw:name="Cadre de texte 4" draw:style-name="gr1" draw:text-style-name="P32" svg:width="2.719cm" svg:height="1.22cm" svg:x="16.118cm" svg:y="-0.219cm"><draw:text-box><text:p><text:span text:style-name="T45">Vitesse Sol</text:span></text:p></draw:text-box></draw:frame><text:span text:style-name="T46"/></text:p>
      <text:p text:style-name="P36"><text:span text:style-name="T46"/></text:p>
      <text:p text:style-name="P36"><text:span text:style-name="T46"/></text:p>
      <text:p text:style-name="P36"><text:span text:style-name="T46"/></text:p>
      <text:p text:style-name="P36"><draw:frame text:anchor-type="paragraph" draw:z-index="16" draw:name="Cadre de texte 6" draw:style-name="gr1" draw:text-style-name="P32" svg:width="2.719cm" svg:height="1.22cm" svg:x="5.36cm" svg:y="0.455cm"><draw:text-box><text:p><text:span text:style-name="T45">Bouton central</text:span></text:p></draw:text-box></draw:frame><draw:frame text:anchor-type="paragraph" draw:z-index="17" draw:name="Cadre de texte 7" draw:style-name="gr1" draw:text-style-name="P32" svg:width="2.719cm" svg:height="1.22cm" svg:x="0.792cm" svg:y="0.379cm"><draw:text-box><text:p><text:span text:style-name="T45">Bouton gauche</text:span></text:p></draw:text-box></draw:frame><draw:frame text:anchor-type="paragraph" draw:z-index="15" draw:name="Cadre de texte 5" draw:style-name="gr4" draw:text-style-name="P32" svg:width="2.719cm" svg:height="0.814cm" svg:x="10.276cm" svg:y="0.788cm"><draw:text-box><text:p><text:span text:style-name="T45">Bouton droit</text:span></text:p></draw:text-box></draw:frame><text:span text:style-name="T46"/></text:p>
      <text:p text:style-name="P36"><text:soft-page-break/><text:span text:style-name="T46">Important :</text:span><text:span text:style-name="T47"> Un appui long sur le bouton centre permet de re-effacer l’écran pour le remettre propre. </text:span></text:p>
      <text:p text:style-name="P27"><text:span text:style-name="T48">B</text:span>outons :</text:p>
      <text:p text:style-name="P28">- gauche <text:span text:style-name="T49">court </text:span>: <text:s/><text:span text:style-name="T50">activer/désactiver </text:span><text:span text:style-name="T51">le son </text:span>d’attente <text:span text:style-name="T52">gps G/S/V </text:span>et/<text:span text:style-name="T53">ou</text:span> alarme<text:span text:style-name="T53">s/pré-alarmes</text:span> <text:span text:style-name="T52">pénétration <text:tab/></text:span>Tma/Zone<text:span text:style-name="T53">s</text:span>.</text:p>
      <text:p text:style-name="P37">- gauche <text:span text:style-name="T54">long</text:span><text:span text:style-name="T49"> : page </text:span><text:span text:style-name="T55">précédente </text:span><text:span text:style-name="T56">(bloqué en vol)</text:span><text:span text:style-name="T49">.</text:span></text:p>
      <text:p text:style-name="P38">- <text:span text:style-name="T53">central : page </text:span><text:span text:style-name="T57">suivante</text:span><text:span text:style-name="T55"> </text:span><text:span text:style-name="T56">(bloqué en vol)</text:span><text:span text:style-name="T53">.</text:span></text:p>
      <text:p text:style-name="P39">- <text:span text:style-name="T53">central long</text:span><text:span text:style-name="T58"> </text:span><text:span text:style-name="T53">: raz de l’écran.</text:span></text:p>
      <text:p text:style-name="P39">- <text:span text:style-name="T53">droit </text:span><text:span text:style-name="T49">court/long</text:span><text:span text:style-name="T53">: démarrage forcé du vol </text:span><text:span text:style-name="T59">( Gps mode S/V) </text:span><text:span text:style-name="T53">/ arrêt du vol </text:span><text:span text:style-name="T60">( </text:span><text:span text:style-name="T59">si &lt; 5kmh et 0,4m/s</text:span><text:span text:style-name="T60">).</text:span></text:p>
      <text:p text:style-name="P40"><text:span text:style-name="T61">Cap magnétique : </text:span><text:span text:style-name="T62">le cap est indiqué suivant la direction de la flèche. Il doit avoir été </text:span><text:span text:style-name="T63">calibré</text:span><text:span text:style-name="T62"> au moins <text:tab/>une fois (fichier /</text:span><text:span text:style-name="T28">config/</text:span><text:span text:style-name="T62">calmag.txt, voir séquence de boot)</text:span></text:p>
      <text:p text:style-name="P41">Dérive sol : <text:span text:style-name="T62">la dérive sol est indiquée en dizaine de degrés &lt;&lt;</text:span><text:span text:style-name="T64">4</text:span><text:span text:style-name="T62"> gauche, </text:span><text:span text:style-name="T64">5&gt;&gt;</text:span><text:span text:style-name="T62"> droite </text:span><text:span text:style-name="T64">ou ^1^ tout droit</text:span><text:span text:style-name="T62">. </text:span><text:span text:style-name="T64">\</text:span><text:span text:style-name="T62">R/ <text:tab/>indique une reculade </text:span><text:span text:style-name="T65">avec alarme sonore désactivable</text:span><text:span text:style-name="T62">. Gauche indique que l’on dérive a gauche <text:tab/>par rapport au cap magnétique. </text:span></text:p>
      <text:p text:style-name="P42"><text:span text:style-name="T66">Nom terrain et finesse / d</text:span>irection <text:span text:style-name="T66">et </text:span>distance du t<text:span text:style-name="T67">errain</text:span> : <text:span text:style-name="T68">I</text:span><text:span text:style-name="T69">ndique </text:span><text:span text:style-name="T70">le nom du </text:span><text:span text:style-name="T67">terrain</text:span><text:span text:style-name="T71"> </text:span><text:span text:style-name="T67">d’atterrissage </text:span><text:span text:style-name="T71">l</text:span><text:span text:style-name="T67">e</text:span><text:span text:style-name="T71"> </text:span><text:span text:style-name="T69">plus <text:tab/></text:span><text:span text:style-name="T71">proche </text:span><text:span text:style-name="T70">et sa finesse pour l’atteindre</text:span><text:span text:style-name="T69">. </text:span></text:p>
      <text:p text:style-name="P43">Cap sol : <text:span text:style-name="T62">cap issue du gps en dizaine de degrés. Indication Nord, Nord Est ..</text:span><text:span text:style-name="T72">.</text:span></text:p>
      <text:p text:style-name="P41">Vitesse sol : <text:span text:style-name="T62">vitesse issue du gps en km/h. </text:span><text:span text:style-name="T73">Hauteur sol </text:span><text:span text:style-name="T74">barométrique</text:span><text:span text:style-name="T73"> en mètres.</text:span></text:p>
      <text:p text:style-name="P43"><text:span text:style-name="T75">Vz </text:span>: <text:span text:style-name="T76">Vz </text:span><text:span text:style-name="T77">du capteur barométrique</text:span><text:span text:style-name="T72">. </text:span><text:span text:style-name="T76">Si la Vz est cerclée de noir c’est qu’elle est négative.</text:span></text:p>
      <text:p text:style-name="P41">Altitude : <text:span text:style-name="T62">Altitude </text:span><text:span text:style-name="T78">barométrique recalée </text:span><text:span text:style-name="T79">altitude sol</text:span><text:span text:style-name="T62"> </text:span><text:span text:style-name="T80">en mètres. </text:span><text:span text:style-name="T81">L</text:span><text:span text:style-name="T78">e recalage </text:span><text:span text:style-name="T79">sol</text:span><text:span text:style-name="T78"> est </text:span><text:span text:style-name="T82">effectué</text:span><text:span text:style-name="T78"> </text:span><text:span text:style-name="T82">toutes le 10 <text:tab/>sec au sol avec l’emmission d’un bip caracteristique. A verifier au moment de la pré-vol.</text:span></text:p>
      <text:p text:style-name="P41">Temps de vol : <text:span text:style-name="T62">Temps de vol en minutes.</text:span></text:p>
      <text:p text:style-name="P44"><text:tab/>‘-<text:span text:style-name="T83">1</text:span>G’ indique une attente de données GPS (voyant rouge clignotant) <text:span text:style-name="T78">(émission d’un bip toutes <text:tab/>les </text:span><text:span text:style-name="T84">5 </text:span><text:span text:style-name="T78">secondes).</text:span></text:p>
      <text:p text:style-name="P45"><text:tab/>‘ <text:span text:style-name="T83">8</text:span><text:span text:style-name="T51">S</text:span>’ indique une attente <text:span text:style-name="T51">d</text:span>e stabilisation des <text:span text:style-name="T51">i</text:span>nformations <text:span text:style-name="T85">longitude, altitude, </text:span><text:span text:style-name="T83">8 satellites en vue</text:span> <text:tab/><text:span text:style-name="T78">(émission d’un bip toutes les </text:span><text:span text:style-name="T84">5 </text:span><text:span text:style-name="T78">secondes).</text:span></text:p>
      <text:p text:style-name="P45"><text:tab/>‘<text:span text:style-name="T83">10</text:span>V’ indique une attente de la vitesse sol <text:span text:style-name="T80">importante </text:span>pour <text:span text:style-name="T85">le </text:span>démarrage de <text:tab/>l’enregistrement du fichier IGC de trace GPS, <text:span text:style-name="T83">10 satellites en vue</text:span>. <text:span text:style-name="T78">(émission de 2 bips toutes <text:tab/>les </text:span><text:span text:style-name="T84">5 </text:span><text:span text:style-name="T78">secondes </text:span><text:span text:style-name="T82">si pas hinibé avec le bouton gauche</text:span><text:span text:style-name="T78">)</text:span></text:p>
      <text:p text:style-name="P46"><text:span text:style-name="T86"><text:tab/>Les fichier IGC générés sont sous </text:span><text:span text:style-name="T87">la</text:span><text:span text:style-name="T86"> forme MMJJHHmm.IGC dans la carte SD </text:span><text:span text:style-name="T88">à</text:span><text:span text:style-name="T87"> la racine </text:span><text:span text:style-name="T89">au <text:tab/>rythme d’un point par seconde</text:span><text:span text:style-name="T86">.</text:span></text:p>
      <text:p text:style-name="P44"><text:tab/><text:span text:style-name="T41">Émission de 3 beep au démarrage de l’enregistrement IGC.</text:span></text:p>
      <text:p text:style-name="P47"><text:tab/><text:span text:style-name="T88">Il peut y a</text:span><text:span text:style-name="T90">voir</text:span><text:span text:style-name="T88"> </text:span><text:span text:style-name="T91">arrêt de vol et </text:span><text:span text:style-name="T92">redémarrage des taches en mode “</text:span><text:span text:style-name="T93">S</text:span><text:span text:style-name="T92">” </text:span><text:span text:style-name="T90">(</text:span><text:span text:style-name="T82">3</text:span><text:span text:style-name="T90"> bips) </text:span><text:span text:style-name="T94">si </text:span><text:span text:style-name="T82">l’on ne vol plus</text:span><text:span text:style-name="T94"> <text:tab/>pendant</text:span><text:span text:style-name="T88"> </text:span><text:span text:style-name="T82">4 </text:span><text:span text:style-name="T91">secondes </text:span><text:span text:style-name="T82">(vitesse sol petite, hauteur sol petite...)</text:span></text:p>
      <text:p text:style-name="P48"><text:span text:style-name="T95"><text:tab/>Il y a aussi arrêt du vol si on appui sur la touche droite</text:span><text:span text:style-name="T96">.</text:span></text:p>
      <text:p text:style-name="P49">Nom terrain et finesse : Conformément au fichier “/<text:span text:style-name="T28">config</text:span>/terconnu.txt” de la carte SD. Affichage du <text:tab/>terrain <text:tab/>accessible avec la plus petite finesse. Et affichage de la finesse pour l’at<text:span text:style-name="T97">t</text:span>eindre.</text:p>
      <text:p text:style-name="P50"><text:span text:style-name="T98">Remarque </text:span><text:span text:style-name="T99">1</text:span> : Il y affichage de la TMA/CTR/Zone protég<text:span text:style-name="T100">é</text:span> pénétré (avec son altitude) à la place du <text:span text:style-name="T101"><text:s/><text:tab/></text:span>nom terrain finesse si l’on est dedans <text:span text:style-name="T82">une zone</text:span> (voir fichier /config/zonesaer.txt). <text:span text:style-name="T102">(</text:span><text:span text:style-name="T82">3</text:span><text:span text:style-name="T103"> </text:span><text:span text:style-name="T102">bip</text:span><text:span text:style-name="T104">s</text:span><text:span text:style-name="T102"> <text:tab/></text:span><text:span text:style-name="T82">caracteristiques </text:span><text:span text:style-name="T102">si dans la zone).</text:span></text:p>
      <text:p text:style-name="P51"><text:soft-page-break/><text:tab/>Be <text:span text:style-name="T105">TMA 5.1 </text:span>al:<text:span text:style-name="T105">3500m</text:span> indique que l’on est en “below” en dessous d<text:span text:style-name="T105">e la TMA 5.1 </text:span>qui <text:tab/>commence a une altitude de <text:span text:style-name="T105">3500</text:span>m <text:span text:style-name="T105">ce jour</text:span>.</text:p>
      <text:p text:style-name="P51"><text:tab/>In <text:span text:style-name="T105">TMA 2.3</text:span> al:1<text:span text:style-name="T105">980</text:span>m indique que l’on est en “in” <text:span text:style-name="T105">on a p</text:span><text:span text:style-name="T106">é</text:span><text:span text:style-name="T105">n</text:span><text:span text:style-name="T106">é</text:span><text:span text:style-name="T105">tr</text:span><text:span text:style-name="T106">é</text:span><text:span text:style-name="T105"> la TMA 2.3</text:span> qui commence a une <text:tab/>altitude de 1<text:span text:style-name="T105">980</text:span>m.</text:p>
      <text:p text:style-name="P51"><text:tab/><text:span text:style-name="T107">Z</text:span>p PROTECT Reserve naturelle al: <text:s text:c="2"/>0m <text:span text:style-name="T107">indique que l’on </text:span><text:span text:style-name="T108">a pénétré </text:span><text:span text:style-name="T107">une zone protège (en <text:tab/></text:span><text:span text:style-name="T109">dessous de 1000/ … /50m sol</text:span><text:span text:style-name="T107">).</text:span></text:p>
      <text:p text:style-name="P52"><text:span text:style-name="T110">Remarque </text:span><text:span text:style-name="T111">2</text:span><text:span text:style-name="T68"> :</text:span><text:span text:style-name="T112">On peut décl</text:span><text:span text:style-name="T113">e</text:span><text:span text:style-name="T112">ncher un début de vol par le bouton droit en </text:span><text:span text:style-name="T114">écran Vz </text:span><text:span text:style-name="T115">(sans stabilisation gps)</text:span><text:span text:style-name="T112">. </text:span><text:span text:style-name="T116">On peut arrêter un vol aussi par le bouton droit si la vitesse sol est &lt; 5kmh et la Vz &lt; 0,</text:span><text:span text:style-name="T82">6</text:span><text:span text:style-name="T116">m/s.</text:span></text:p>
      <text:h text:style-name="P53" text:outline-level="1"><text:bookmark-start text:name="__RefHeading___Toc4256_2919898572"/>Écran <text:span text:style-name="T44">Histo</text:span>:<text:bookmark-end text:name="__RefHeading___Toc4256_2919898572"/></text:h>
      <text:p text:style-name="P54">On accède à l’écran <text:span text:style-name="T117">Histo </text:span>par un appu<text:span text:style-name="T61">i</text:span> sur le <text:span text:style-name="T118">bouton</text:span> <text:span text:style-name="T117">centre </text:span><text:span text:style-name="T82">a</text:span><text:span text:style-name="T117">pr</text:span><text:span text:style-name="T82">è</text:span><text:span text:style-name="T117">s l’écran Vz</text:span>. L’écran revient <text:span text:style-name="T119">à</text:span> l’écran <text:span text:style-name="T117">Vz</text:span> au bout de <text:span text:style-name="T120">15 secondes</text:span>.</text:p>
      <text:p text:style-name="P55"><draw:frame draw:style-name="fr2" draw:name="Image12" text:anchor-type="char" svg:x="4.329cm" svg:y="-0.182cm" svg:width="9.181cm" svg:height="12.241cm" draw:z-index="43"><draw:image xlink:href="Pictures/100000000000015A000001CD6D22A8A4.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6"><text:soft-page-break/>L’écran <text:span text:style-name="T82">Histo</text:span> contient <text:span text:style-name="T118">le nom du fichier Igc,</text:span> la Z décollage, la Z max, la Vz Max, la Vz Min, la distance parcourue, la Vs Max et le temps total du vol. Ces informations sont issues d<text:span text:style-name="T118">es</text:span> fichier<text:span text:style-name="T118">s</text:span> “<text:span text:style-name="T121">/</text:span><text:span text:style-name="T122">histo</text:span><text:span text:style-name="T121">/</text:span><text:span text:style-name="T122">nom_igc</text:span><text:span text:style-name="T121">.</text:span><text:span text:style-name="T122">his</text:span>”.</text:p>
      <text:p text:style-name="P57"><text:span text:style-name="T48">B</text:span>outons :</text:p>
      <text:p text:style-name="P58">- gauche <text:span text:style-name="T54">long</text:span><text:span text:style-name="T49"> </text:span>: <text:s/><text:span text:style-name="T54">page </text:span><text:span text:style-name="T123">précédente</text:span>.</text:p>
      <text:p text:style-name="P58">- <text:span text:style-name="T53">central : page </text:span><text:span text:style-name="T57">suivante</text:span><text:span text:style-name="T53">.</text:span></text:p>
      <text:p text:style-name="P58">- <text:span text:style-name="T53">central long</text:span><text:span text:style-name="T58"> </text:span><text:span text:style-name="T53">: raz de l’écran.</text:span></text:p>
      <text:p text:style-name="P59"/>
      <text:h text:style-name="P60" text:outline-level="1"><text:bookmark-start text:name="__RefHeading___Toc4258_2919898572"/>Écran <text:span text:style-name="T124">Affichage / </text:span><text:span text:style-name="T125">Archivage</text:span><text:span text:style-name="T124"> IGC</text:span> :<text:bookmark-end text:name="__RefHeading___Toc4258_2919898572"/></text:h>
      <text:p text:style-name="P61"><text:span text:style-name="T124">Ces 2 écrans entre les écrans historique du dernier vol et gestion des TMA permettent :</text:span> </text:p>
      <text:p text:style-name="P61">- <text:span text:style-name="T124">pour l’écran </text:span><text:span text:style-name="T126">affichage igc</text:span><text:span text:style-name="T124">, affichage </text:span><text:span text:style-name="T126">d</text:span><text:span text:style-name="T124">es temps des fichiers IGC sur la carte SD et calcul </text:span><text:span text:style-name="T126">de</text:span><text:span text:style-name="T124"> leur total en minutes </text:span><text:span text:style-name="T127">decimale </text:span><text:span text:style-name="T128">(si vol supérieur à 30 secondes)</text:span><text:span text:style-name="T129">.</text:span></text:p>
      <text:p text:style-name="P61">- <text:span text:style-name="T124">pour l’écran </text:span><text:span text:style-name="T126">arch</text:span><text:span text:style-name="T130">i</text:span><text:span text:style-name="T126">vage</text:span><text:span text:style-name="T124"> (bouton </text:span><text:span text:style-name="T130">gauche/droite</text:span><text:span text:style-name="T124">, </text:span><text:span text:style-name="T126">permet </text:span><text:span text:style-name="T124">d’</text:span><text:span text:style-name="T125">archiver</text:span><text:span text:style-name="T124"> tous les fichiers IGC de la carte </text:span><text:span text:style-name="T125">qui sont à <text:tab/>la racine. Dans le répertoire /arch/annee</text:span><text:span text:style-name="T124">. </text:span><text:span text:style-name="T131">Destruction des vols &lt; 1 min.</text:span></text:p>
      <text:p text:style-name="P61"/>
      <text:p text:style-name="P61"><draw:frame draw:style-name="fr2" draw:name="Image13" text:anchor-type="char" svg:x="3.203cm" svg:y="-0.169cm" svg:width="10.215cm" svg:height="13.619cm" draw:z-index="44"><draw:image xlink:href="Pictures/100000000000018100000202BA51F32F.png" xlink:type="simple" xlink:show="embed" xlink:actuate="onLoad" draw: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2"><text:soft-page-break/><text:span text:style-name="T48">B</text:span>outons :</text:p>
      <text:p text:style-name="P63">- gauche <text:span text:style-name="T54">long</text:span><text:span text:style-name="T49"> </text:span>: <text:s/><text:span text:style-name="T54">page </text:span><text:span text:style-name="T55">précédente</text:span>.</text:p>
      <text:p text:style-name="P64">- <text:span text:style-name="T53">central : page </text:span><text:span text:style-name="T57">suivante</text:span><text:span text:style-name="T53">.</text:span></text:p>
      <text:p text:style-name="P64">- <text:span text:style-name="T53">central long</text:span><text:span text:style-name="T58"> </text:span><text:span text:style-name="T53">: raz de l’écran.</text:span></text:p>
      <text:p text:style-name="P65"><text:span text:style-name="T132">- </text:span><text:span text:style-name="T133">gauche/droit : archivage fichier igc. (central annulation)</text:span></text:p>
      <text:p text:style-name="P66"/>
      <text:h text:style-name="P67" text:outline-level="1"><text:bookmark-start text:name="__RefHeading___Toc4260_2919898572"/>Écran <text:span text:style-name="T44">Zone Aériennes</text:span> / <text:span text:style-name="T134">Modification </text:span>:<text:bookmark-end text:name="__RefHeading___Toc4260_2919898572"/></text:h>
      <text:p text:style-name="P68"/>
      <text:p text:style-name="P68"><draw:frame draw:style-name="fr2" draw:name="Image6" text:anchor-type="char" svg:x="3.411cm" svg:y="-0.215cm" svg:width="8.535cm" svg:height="11.912cm" draw:z-index="45"><draw:image xlink:href="Pictures/1000000000000142000001C1D7E252D3.png" xlink:type="simple" xlink:show="embed" xlink:actuate="onLoad" draw: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On accède à l’écran <text:span text:style-name="T135">zone aéri</text:span><text:span text:style-name="T134">e</text:span><text:span text:style-name="T135">nnes</text:span> par un appu<text:span text:style-name="T61">i</text:span> sur le bouton <text:span text:style-name="T135">centre depuis histo</text:span>. L’écran revient <text:span text:style-name="T119">à</text:span> l’écran 0 au bout de <text:span text:style-name="T120">15 secondes</text:span>. <text:span text:style-name="T120">Cet écran est p</text:span><text:span text:style-name="T44">our la gestion des zones aériennes. On a le nombre de zones aéri</text:span><text:span text:style-name="T136">e</text:span><text:span text:style-name="T44">nnes en mé</text:span><text:span text:style-name="T136">m</text:span><text:span text:style-name="T44">oire, </text:span><text:span text:style-name="T137">ainsi que le nom des zones modifiables activ</text:span><text:span text:style-name="T138">ée</text:span><text:span text:style-name="T137">s. </text:span><text:span text:style-name="T139">Celles non modificables ou </text:span><text:span text:style-name="T140">désactivée </text:span><text:span text:style-name="T139">ne sont pas affichées</text:span><text:span text:style-name="T44">. </text:span></text:p>
      <text:p text:style-name="P69">Depuis l’écran <text:span text:style-name="T135">zone aéri</text:span><text:span text:style-name="T134">e</text:span><text:span text:style-name="T135">nne</text:span>, avec un clic <text:span text:style-name="T134">droit/gauche</text:span> on passe <text:span text:style-name="T141">à</text:span> l’écran <text:span text:style-name="T134">modification </text:span>pour lire ou modifier l’activation des zones. <text:span text:style-name="T142"><text:s/>L’écran revient </text:span><text:span text:style-name="T119">à</text:span><text:span text:style-name="T142"> l’écran </text:span><text:span text:style-name="T134">Vz</text:span><text:span text:style-name="T142"> au bout de </text:span><text:span text:style-name="T120">15 secondes. </text:span>Les boutons gauche/droit font défiler les zones, le bouton centrale peut modifier l’activation de la zone en cour (si elle est mod et pas const). <text:span text:style-name="T143">Pour les zone modifiables (ex :R68 ou R368) voir le fichier config/zonesact.txt)</text:span></text:p>
      <text:p text:style-name="P68"><text:span text:style-name="T44">Il y a affichage </text:span><text:span text:style-name="T137">à l’écran </text:span><text:span text:style-name="T134">modification</text:span><text:span text:style-name="T137"> </text:span><text:span text:style-name="T44">des informations nom, activation modifiable </text:span><text:span text:style-name="T141">(</text:span><text:span text:style-name="T44">mod</text:span><text:span text:style-name="T141">)</text:span><text:span text:style-name="T44"> ou figée </text:span><text:span text:style-name="T141">(</text:span><text:span text:style-name="T44">const</text:span><text:span text:style-name="T141">)</text:span><text:span text:style-name="T44">, altitude basse hors période, période début JJ-MM, période fin JJ-MM, altitude basse période </text:span><text:soft-page-break/><text:span text:style-name="T44">semaine, altitude basse période week-en</text:span><text:span text:style-name="T120">d. </text:span><text:span text:style-name="T144">Si la zone est « protect » ou « ffvl-prot », affichage de la hauteur sol minimale de survole (ex : Chastreix, Chaudefour, Parc des Cevennes, Gypaete barbu...)</text:span></text:p>
      <text:p text:style-name="P68"/>
      <text:p text:style-name="P70"/>
      <text:p text:style-name="P70"><draw:frame draw:style-name="fr2" draw:name="Image7" text:anchor-type="char" svg:x="4.383cm" svg:y="-0.305cm" svg:width="9.066cm" svg:height="12.088cm" draw:z-index="46"><draw:image xlink:href="Pictures/1000000000000155000001C848DAAF99.png" xlink:type="simple" xlink:show="embed" xlink:actuate="onLoad" draw:mime-type="image/pn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62"><text:span text:style-name="T48">B</text:span>outons :</text:p>
      <text:p text:style-name="P63">- gauche <text:span text:style-name="T54">long</text:span><text:span text:style-name="T49"> </text:span>: <text:s/><text:span text:style-name="T54">page </text:span><text:span text:style-name="T55">précédente</text:span>.</text:p>
      <text:p text:style-name="P64">- <text:span text:style-name="T53">central : page </text:span><text:span text:style-name="T57">suivante</text:span><text:span text:style-name="T53">. </text:span><text:span text:style-name="T145">si mode navigation zone : activation/désactivation Tma/Zone</text:span></text:p>
      <text:p text:style-name="P64">- <text:span text:style-name="T53">central long</text:span><text:span text:style-name="T58"> </text:span><text:span text:style-name="T53">: raz de l’écran.</text:span></text:p>
      <text:p text:style-name="P71">- <text:span text:style-name="T145">g</text:span>auche/<text:span text:style-name="T145">droite : </text:span><text:span text:style-name="T146">mode </text:span><text:span text:style-name="T145">navigation dans Tma/Zone et</text:span> retour page Tma global.</text:p>
      <text:p text:style-name="P72">- <text:span text:style-name="T55">long</text:span> G/D début/fin <text:span text:style-name="T145">Tma/Zones si mode navigation </text:span>Tma/<text:span text:style-name="T147">Z</text:span><text:span text:style-name="T145">one</text:span>.</text:p>
      <text:p text:style-name="P72"/>
      <text:p text:style-name="P70"/>
      <text:p text:style-name="P70"><text:soft-page-break/></text:p>
      <text:p text:style-name="P70">La modification de l’activation de la zone est mémorisé<text:span text:style-name="T148">e</text:span> dans le fichier <text:span text:style-name="T121">/config/zone</text:span><text:span text:style-name="T149">s</text:span><text:span text:style-name="T121">act.txt. Et seul les zones présente dans ce fichier sont modifiable. Le format est : nom_zone;0;. </text:span><text:span text:style-name="T150">Il faut donc le générer une première fois avec un édit</text:span><text:span text:style-name="T151">e</text:span><text:span text:style-name="T150">ur de texte, pour pouvoir le modifier par la suite.</text:span></text:p>
      <text:p text:style-name="P73"><draw:frame draw:style-name="fr3" draw:name="Image8" text:anchor-type="char" svg:width="10.61cm" svg:height="7.408cm" draw:z-index="24"><draw:image xlink:href="Pictures/10000000000001900000011761FA1335.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Remarque :</text:p>
      <text:p text:style-name="P76"><text:tab/>Les zones ne figurant pas dans ce fichier sont considér<text:span text:style-name="T152">é</text:span>e<text:span text:style-name="T153">s</text:span> comme toujours actives.</text:p>
      <text:p text:style-name="P76"><text:tab/><text:span text:style-name="T154">Il y a regroupement de zone suivant les 2 permier champ. Ex : R_68 modifiera R_68_A et <text:tab/>R_68_B...</text:span></text:p>
      <text:p text:style-name="P74"/>
      <text:p text:style-name="P77"><text:span text:style-name="T121">La totalité des zones sont dans le fichier </text:span><text:span text:style-name="T155"><text:s/>/config/zone</text:span><text:span text:style-name="T121">saer</text:span><text:span text:style-name="T155">.tx</text:span><text:span text:style-name="T121">t, voir plus bas pour le générer.</text:span></text:p>
      <text:p text:style-name="P74"/>
      <text:p text:style-name="P78"/>
      <text:p text:style-name="P77"><text:span text:style-name="T121">La configuration des périodes est dans le fichier</text:span><text:span text:style-name="T155"> /config/zone</text:span><text:span text:style-name="T121">sper</text:span><text:span text:style-name="T155">.tx</text:span><text:span text:style-name="T121">t. Il est de la forme : </text:span></text:p>
      <text:p text:style-name="P74"><text:tab/>nom zone;nom affichage;début période;fin période;alti semaine;alti week-end</text:p>
      <text:p text:style-name="P74"><text:tab/>ex : TMA CLERMONT 2.1;TMA CFD 2;15-03;15-10;1980;1980</text:p>
      <text:p text:style-name="P77"><text:span text:style-name="T156">N</text:span><text:span text:style-name="T121">om zone est le nom d</text:span><text:span text:style-name="T156">ans le</text:span><text:span text:style-name="T121"> fichier </text:span><text:span text:style-name="T155">/config/zone</text:span><text:span text:style-name="T121">saer</text:span><text:span text:style-name="T155">.tx</text:span><text:span text:style-name="T121">t, les 3 pr</text:span><text:span text:style-name="T157">e</text:span><text:span text:style-name="T121">miers champs. </text:span><text:span text:style-name="T156">N</text:span><text:span text:style-name="T121">om affichage est le nom de remplacement </text:span><text:span text:style-name="T156">à</text:span><text:span text:style-name="T121"> l’affichage, puis JJ-MM début période, JJ-MM fin de période, altitude période semaine, altitude période week-end.</text:span></text:p>
      <text:p text:style-name="P74"/>
      <text:p text:style-name="P74"><draw:frame draw:style-name="fr2" draw:name="Image9" text:anchor-type="char" svg:x="0.212cm" svg:y="0.365cm" svg:width="16.958cm" svg:height="6.884cm" draw:z-index="25"><draw:image xlink:href="Pictures/1000000000000280000001040143C888.png" xlink:type="simple" xlink:show="embed" xlink:actuate="onLoad" draw:mime-type="image/png"/></draw:frame><text:tab/></text:p>
      <text:p text:style-name="P74"/>
      <text:p text:style-name="P78"/>
      <text:h text:style-name="P79" text:outline-level="1"><text:bookmark-start text:name="__RefHeading___Toc4262_2919898572"/>Écran <text:span text:style-name="T158">Éditeur Configuration</text:span>:<text:bookmark-end text:name="__RefHeading___Toc4262_2919898572"/></text:h>
      <text:p text:style-name="P80">On accède à l’écran <text:span text:style-name="T158">éditeur</text:span> par un appu<text:span text:style-name="T61">i</text:span> sur le bouton <text:span text:style-name="T158">centre </text:span><text:span text:style-name="T159">a</text:span><text:span text:style-name="T158">près l’écran TMA. O</text:span><text:span text:style-name="T160">n a </text:span><text:span text:style-name="T161">alors </text:span><text:span text:style-name="T160">acc</text:span><text:span text:style-name="T162">è</text:span><text:span text:style-name="T160">s a un mini éditeur d</text:span><text:span text:style-name="T163">u</text:span><text:span text:style-name="T160"> fichier de configuration. On peut ainsi modifier les variable par bo</text:span><text:span text:style-name="T164">u</text:span><text:span text:style-name="T160">ton central, puis G/D </text:span><text:span text:style-name="T165">pour incrémenter / décrémenter</text:span><text:span text:style-name="T160">. Ex 1: [dtu] =&gt; augmentation/diminution de 1 avec les boutons. Ex 2 : [vz_seuil_haut] =&gt; augmentation/diminution de 0,</text:span><text:span text:style-name="T166">05</text:span><text:span text:style-name="T160"> avec les boutons C/G/D. </text:span><text:span text:style-name="T164">Les modifications sont automatiquement pris en compte et sauvegardées dans le fichier de configuration /config/config.txt d</text:span><text:span text:style-name="T167">è</text:span><text:span text:style-name="T164">s le retour à </text:span><text:span text:style-name="T167">une autre page</text:span><text:span text:style-name="T164">. </text:span><text:span text:style-name="T168">S’il n’y avait pas de fichier, un fichier par défaut est créé.</text:span></text:p>
      <text:p text:style-name="P81"><text:span text:style-name="T169">Important</text:span> :</text:p>
      <text:p text:style-name="P80"><text:span text:style-name="T170">Le coefficient de filtrage Vz doit etre à 0,85</text:span><text:span text:style-name="T168">.</text:span></text:p>
      <text:p text:style-name="P62"><text:span text:style-name="T48">B</text:span>outons :</text:p>
      <text:p text:style-name="P63">- gauche <text:span text:style-name="T54">long</text:span><text:span text:style-name="T49"> </text:span>: <text:s/><text:span text:style-name="T54">page </text:span><text:span text:style-name="T55">précédente</text:span>.</text:p>
      <text:p text:style-name="P64">- <text:span text:style-name="T53">central : page </text:span><text:span text:style-name="T57">suivante</text:span><text:span text:style-name="T53">. </text:span><text:span text:style-name="T145">si mode navigation variables : </text:span><text:span text:style-name="T171">mode </text:span><text:span text:style-name="T145">modification/navigation variable.</text:span></text:p>
      <text:p text:style-name="P64">- <text:span text:style-name="T53">central long</text:span><text:span text:style-name="T58"> </text:span><text:span text:style-name="T53">: raz de l’écran.</text:span></text:p>
      <text:p text:style-name="P71">- <text:span text:style-name="T145">g</text:span>auche/<text:span text:style-name="T145">droite : navigation dans variable et sortie de navigation variable</text:span>. <text:tab/><text:span text:style-name="T172">Incrémentation/décrémentation variable si mode modification.</text:span></text:p>
      <text:p text:style-name="P71">- <text:span text:style-name="T55">long</text:span> G/D début/fin <text:span text:style-name="T145">variable si mode navigation variable</text:span>.</text:p>
      <text:p text:style-name="P71"/>
      <text:h text:style-name="P82" text:outline-level="1"><text:bookmark-start text:name="__RefHeading___Toc4264_2919898572"/>Écran <text:span text:style-name="T173">Tma Dessous</text:span>:<text:bookmark-end text:name="__RefHeading___Toc4264_2919898572"/></text:h>
      <text:p text:style-name="P83">On accède à l’écran <text:span text:style-name="T173">Tma dessous</text:span> par un appu<text:span text:style-name="T61">i</text:span> sur le bouton <text:span text:style-name="T158">centre </text:span><text:span text:style-name="T174">a</text:span><text:span text:style-name="T158">pr</text:span><text:span text:style-name="T174">è</text:span><text:span text:style-name="T158">s l’écran </text:span><text:span text:style-name="T173">éditeur</text:span><text:span text:style-name="T158">. O</text:span><text:span text:style-name="T160">n a </text:span><text:span text:style-name="T161">alors </text:span><text:span text:style-name="T160">acc</text:span><text:span text:style-name="T162">è</text:span><text:span text:style-name="T160">s </text:span><text:span text:style-name="T175">à la Tma sous laquelle on est, </text:span><text:span text:style-name="T176">avec son altitude. </text:span><text:span text:style-name="T177">Ainsi que les coordonnées du point gps en cours.</text:span></text:p>
      <text:p text:style-name="P62"><text:span text:style-name="T48">B</text:span>outons :</text:p>
      <text:p text:style-name="P63">- gauche <text:span text:style-name="T54">long</text:span><text:span text:style-name="T49"> </text:span>: <text:s/><text:span text:style-name="T54">page </text:span><text:span text:style-name="T55">précédente</text:span>.</text:p>
      <text:p text:style-name="P64">- <text:span text:style-name="T53">central : page </text:span><text:span text:style-name="T57">suivante</text:span><text:span text:style-name="T53">. </text:span><text:span text:style-name="T145">Annulation mémorisation point.</text:span></text:p>
      <text:p text:style-name="P64">- <text:span text:style-name="T53">central long</text:span><text:span text:style-name="T58"> </text:span><text:span text:style-name="T53">: raz de l’écran.</text:span></text:p>
      <text:p text:style-name="P71">- <text:span text:style-name="T145">g</text:span>auche/<text:span text:style-name="T145">droite : mémorisation point courant </text:span><text:span text:style-name="T178">dans le fichier des terrains connus. Exemple : mémoriser <text:tab/>un nouveau terrain d’atterrissage.</text:span></text:p>
      <text:p text:style-name="P84"/>
      <text:h text:style-name="P82" text:outline-level="1"><text:bookmark-start text:name="__RefHeading___Toc4266_2919898572"/>Écran<text:span text:style-name="T44"> Système</text:span> :<text:bookmark-end text:name="__RefHeading___Toc4266_2919898572"/></text:h>
      <text:p text:style-name="P83">On accède à l’écran <text:span text:style-name="T158">système</text:span> par un appu<text:span text:style-name="T61">i</text:span> sur le bouton <text:span text:style-name="T158">centre âpres l’écran </text:span><text:span text:style-name="T173">Tma dessous</text:span>. L’écran revient <text:span text:style-name="T119">à</text:span> l’écran <text:span text:style-name="T158">Vz</text:span> au bout de <text:span text:style-name="T120">15 secondes</text:span>. <text:span text:style-name="T120">Cet écran est plus information</text:span><text:span text:style-name="T179">s</text:span><text:span text:style-name="T120"> système avec date et heure, cap magnétique, pourcentage </text:span><text:span text:style-name="T180">d’</text:span><text:span text:style-name="T181">utilisation</text:span><text:span text:style-name="T120"> core 0 et 1, </text:span><text:span text:style-name="T66">température à l’intérieur du boîtier</text:span><text:span text:style-name="T120">, mémoire libre en octets, tension batterie, et numéro du firmware. </text:span><text:span text:style-name="T182">Pour info, une zone aérienne prend de 1 à quelques ko suivant sa taille. Il y a donc de la marge dans le cas ci-dessous.</text:span></text:p>
      <text:p text:style-name="P85"><draw:frame draw:style-name="fr2" draw:name="Image10" text:anchor-type="char" svg:x="3.925cm" svg:y="0.115cm" svg:width="9.021cm" svg:height="12.026cm" draw:z-index="47"><draw:image xlink:href="Pictures/1000000000000154000001C6A9899495.png" xlink:type="simple" xlink:show="embed" xlink:actuate="onLoad" draw:mime-type="image/png"/></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6"><text:span text:style-name="T183">B</text:span><text:span text:style-name="T98">outons :</text:span></text:p>
      <text:p text:style-name="P63">- gauche <text:span text:style-name="T54">long</text:span><text:span text:style-name="T49"> </text:span>: <text:s/><text:span text:style-name="T54">page </text:span><text:span text:style-name="T55">précédente</text:span>.</text:p>
      <text:p text:style-name="P87">- <text:span text:style-name="T53">central : page </text:span><text:span text:style-name="T57">suivante</text:span><text:span text:style-name="T53">.</text:span></text:p>
      <text:p text:style-name="P87">- <text:span text:style-name="T139">droit long : </text:span></text:p>
      <text:h text:style-name="P88" text:outline-level="1"><text:bookmark-start text:name="__RefHeading___Toc4268_2919898572"/><text:soft-page-break/><text:span text:style-name="T142">Fichier de configuration</text:span> <text:span text:style-name="T142">SDCard/</text:span><text:span text:style-name="T28">config/</text:span><text:span text:style-name="T142">config.txt</text:span><text:span text:style-name="T184"> </text:span>:<text:bookmark-end text:name="__RefHeading___Toc4268_2919898572"/></text:h>
      <text:p text:style-name="P54">Le fichier de configuration doit être placé <text:span text:style-name="T28">dans le dossi</text:span><text:span text:style-name="T185">e</text:span><text:span text:style-name="T28">r /config </text:span>a la racine de la carte SD. La carte SD contient aussi les fichier IGC générés par un vol (ou un faux vol de <text:span text:style-name="T174">12</text:span><text:span text:style-name="T186"> secondes</text:span>).</text:p>
      <text:p text:style-name="P54"><draw:frame draw:style-name="fr4" draw:name="Image3" text:anchor-type="char" svg:width="17.59cm" svg:height="11.606cm" draw:z-index="28"><draw:image xlink:href="Pictures/1000000000000298000001B5D0ED245D.png" xlink:type="simple" xlink:show="embed" xlink:actuate="onLoad" draw:mime-type="image/png"/></draw:frame></text:p>
      <text:p text:style-name="P89">Compl<text:span text:style-name="T148">é</text:span>ter les informations nécessaires dans ce fichier. Les # sont des commentaires, pour le mot de passe, ssid, pilote et voile les ‘_’ sont remplacés par des <text:span text:style-name="T10">blancs/espaces</text:span>. </text:p>
      <text:p text:style-name="P90">Le fichier est généré automatiquement si vous passer une fois en page mini éditeur s’il n’existait pas auparavant avec les valeurs par défaut.</text:p>
      <text:p text:style-name="P91"><text:span text:style-name="T187">[</text:span>coef_filtre_alti_baro<text:span text:style-name="T187">]</text:span> : filtrage alti baro, <text:span text:style-name="T188">valeur</text:span> [0,1<text:span text:style-name="T188">[</text:span>, 0.99<text:span text:style-name="T188">9</text:span> donne un tr<text:span text:style-name="T188">è</text:span>s grand filtrage <text:span text:style-name="T188">mais un léger <text:tab/>retard dans la valeur.</text:span> 0. ne filtre rien <text:span text:style-name="T188">et donne par conséquent des beep intempestifs. </text:span><text:span text:style-name="T189">Mettre <text:tab/>0.</text:span><text:span text:style-name="T190">8</text:span><text:span text:style-name="T191">5</text:span><text:span text:style-name="T189"> pour un filtrage correct.</text:span></text:p>
      <text:p text:style-name="P92"><text:span text:style-name="T187">[</text:span>vitesse_igc_kmh<text:span text:style-name="T187">]</text:span> : vitesse sol de déclenchement de l’enregistrement. <text:span text:style-name="T192">Début de vol déclenché au bout <text:tab/>de </text:span><text:span text:style-name="T193">temps_igc_sec</text:span><text:span text:style-name="T192"> secondes de vitesse successive supérieur à </text:span><text:span text:style-name="T194">(</text:span><text:span text:style-name="T195">1</text:span><text:span text:style-name="T191">4</text:span><text:span text:style-name="T194">km/h par défaut)</text:span><text:span text:style-name="T192">. </text:span><text:span text:style-name="T196">S’il y a faux </text:span><text:span text:style-name="T192"><text:s/></text:span><text:span text:style-name="T197"><text:s/><text:tab/>départs de vols </text:span><text:span text:style-name="T196">cause imprécision gps, ne pas bouger le temps de la détection de stationnarité <text:tab/>(quelques secondes). </text:span><text:span text:style-name="T197">Il y a </text:span><text:span text:style-name="T196">alors </text:span><text:span text:style-name="T92">redémarrage des taches</text:span><text:span text:style-name="T197"> automatique</text:span><text:span text:style-name="T196">ment en mode </text:span><text:span text:style-name="T198">S/</text:span><text:span text:style-name="T196">V.</text:span></text:p>
      <text:p text:style-name="P93"/>
      <text:p text:style-name="P94"><text:soft-page-break/><text:span text:style-name="T187">[</text:span>v<text:span text:style-name="T193">z</text:span>_igc_<text:span text:style-name="T193">ms</text:span><text:span text:style-name="T187">]</text:span> : <text:span text:style-name="T199">+ ou - </text:span><text:span text:style-name="T193">vitesse verticale pour déclencher un vol </text:span><text:span text:style-name="T194">(0,</text:span><text:span text:style-name="T200">6</text:span><text:span text:style-name="T194"> par défaut)</text:span><text:span text:style-name="T193">.</text:span></text:p>
      <text:p text:style-name="P95"><text:span text:style-name="T187">[</text:span>vz_seuil_haut<text:span text:style-name="T187">]</text:span> : Vz ascendante de déclenchement des beep<text:span text:style-name="T197">s</text:span> <text:span text:style-name="T197">aiguës </text:span><text:span text:style-name="T194">(0,2 par défaut)</text:span>.</text:p>
      <text:p text:style-name="P95"><text:span text:style-name="T187">[</text:span>vz_seuil_bas<text:span text:style-name="T187">]</text:span> : Vz descendante de déclenchement des beep<text:span text:style-name="T197">s grave</text:span> <text:span text:style-name="T194">(-2,</text:span><text:span text:style-name="T200">6</text:span><text:span text:style-name="T194"> par défaut)</text:span>.</text:p>
      <text:p text:style-name="P96"><text:span text:style-name="T187">[</text:span>vz_seuil_<text:span text:style-name="T201">max</text:span><text:span text:style-name="T187">]</text:span> : Vz <text:span text:style-name="T201">ascendante</text:span> de<text:span text:style-name="T201">s</text:span> <text:span text:style-name="T201">beep vario maximum très aiguës</text:span> <text:span text:style-name="T194">(4 par défaut)</text:span>.</text:p>
      <text:p text:style-name="P97">[alarme_reculade] : <text:span text:style-name="T65">activation alarme </text:span><text:span text:style-name="T202">s</text:span><text:span text:style-name="T65">onore reculade </text:span><text:span text:style-name="T203">(désactive par défaut)</text:span><text:span text:style-name="T202">.</text:span></text:p>
      <text:p text:style-name="P98"><text:span text:style-name="T204">[</text:span><text:span text:style-name="T205">ssid_ru</text:span><text:span text:style-name="T204">]</text:span><text:span text:style-name="T205"> : nom wifi </text:span><text:span text:style-name="T206">pour téléchargement des IGC via navigateur web. </text:span><text:span text:style-name="T207">(underscores remplacés par des <text:tab/>espaces)</text:span></text:p>
      <text:p text:style-name="P99"><text:span text:style-name="T187">[</text:span>dtu<text:span text:style-name="T187">]</text:span> : heure a ajouter a l’heure gps pour le nom des fichiers *.igc.</text:p>
      <text:p text:style-name="P100"><text:span text:style-name="T187">[</text:span>passwd_ru<text:span text:style-name="T187">]</text:span> : mot de passe wifi <text:span text:style-name="T208">(underscores remplacés par des espaces)</text:span></text:p>
      <text:p text:style-name="P101"><text:span text:style-name="T187">[</text:span>pilote_ru<text:span text:style-name="T187">]</text:span> : nom de pilote <text:span text:style-name="T197">dans le fichier </text:span>igc <text:span text:style-name="T208">(underscores remplacés par des espaces)</text:span></text:p>
      <text:p text:style-name="P101"><text:span text:style-name="T187">[</text:span>voile_ru<text:span text:style-name="T187">]</text:span> : nom de voile <text:span text:style-name="T197">dans le </text:span>fichier igc <text:span text:style-name="T208">(underscores remplacés par des espaces)</text:span></text:p>
      <text:p text:style-name="P102"/>
      <text:p text:style-name="P103"/>
      <text:h text:style-name="Heading_20_1" text:outline-level="1"><text:bookmark-start text:name="__RefHeading___Toc4270_2919898572"/><text:span text:style-name="T142">Fichier de </text:span><text:span text:style-name="T197">terrains connus </text:span><text:span text:style-name="T142">SDCard/</text:span><text:span text:style-name="T28">config/</text:span><text:span text:style-name="T197">terconnu</text:span><text:span text:style-name="T142">.txt</text:span><text:span text:style-name="T184"> </text:span>:<text:bookmark-end text:name="__RefHeading___Toc4270_2919898572"/></text:h>
      <text:p text:style-name="P104"><draw:frame draw:style-name="fr4" draw:name="Image5" text:anchor-type="char" svg:width="17.59cm" svg:height="12.099cm" draw:z-index="23"><draw:image xlink:href="Pictures/1000000000000298000001C8F01ED3A7.png" xlink:type="simple" xlink:show="embed" xlink:actuate="onLoad" draw:mime-type="image/png"/></draw:frame><text:soft-page-break/>Comme vous pouvez le voir, ce fichier liste les terrains connus avec leur nom de 10 caractères maximum ainsi que leur coordonnes. Utile pour avoir la finesse du terrain le plus proche. <text:span text:style-name="T209">Et pour générer les zones aériennes autour de ces points.</text:span></text:p>
      <text:p text:style-name="P105">De plus ce fichier peut etre utilisé pour generer les zones aériennes (rayon autour des points)</text:p>
      <text:h text:style-name="P106" text:outline-level="1"><text:bookmark-start text:name="__RefHeading___Toc4272_2919898572"/>Fichier <text:span text:style-name="T197">de calibration </text:span><text:span text:style-name="T210">SDCard</text:span><text:span text:style-name="T197">/</text:span><text:span text:style-name="T28">config/</text:span><text:span text:style-name="T197">calmag.txt</text:span> :<text:bookmark-end text:name="__RefHeading___Toc4272_2919898572"/></text:h>
      <text:p text:style-name="P104">Ce fichier est généré automatiquement par appuis au boot sur le bouton gauche. Faire des 8 avec le boîtier jusqu’au redémarrage pour calibrer le capteur magnétique.</text:p>
      <text:p text:style-name="P104"/>
      <text:h text:style-name="Heading_20_1" text:outline-level="1"><text:bookmark-start text:name="__RefHeading___Toc4274_2919898572"/>Fichier <text:span text:style-name="T197">d’</text:span><text:span text:style-name="T210">historique de vol</text:span><text:span text:style-name="T197"> </text:span><text:span text:style-name="T210">SDCard</text:span><text:span text:style-name="T197">/</text:span><text:span text:style-name="T28">config/</text:span><text:span text:style-name="T210">histovol</text:span><text:span text:style-name="T197">.txt</text:span> :<text:bookmark-end text:name="__RefHeading___Toc4274_2919898572"/></text:h>
      <text:p text:style-name="P107">Ce fichier est généré automatiquement <text:span text:style-name="T210">à chaque nouveau vol</text:span>. <text:span text:style-name="T210">Il est lu pour afficher l’écran 1. Sa forme est la même que celle dur fichier “/config/config.txt”</text:span>.</text:p>
      <text:p text:style-name="P108"/>
      <text:h text:style-name="P109" text:outline-level="1"><text:bookmark-start text:name="__RefHeading___Toc4276_2919898572"/>Fichier IGC :<text:bookmark-end text:name="__RefHeading___Toc4276_2919898572"/></text:h>
      <text:p text:style-name="P110"><text:span text:style-name="T211">Les fichier IGC </text:span><text:span text:style-name="T205">sont téléchargeable en mode wifi (voir séquence de boot) et </text:span><text:span text:style-name="T211">peuvent être visualisés sur le web avec </text:span><text:a xlink:type="simple" xlink:href="https://e-logbook.org/" text:style-name="Internet_20_link" text:visited-style-name="Visited_20_Internet_20_Link"><text:span text:style-name="T211">https://e-logbook.org</text:span></text:a><text:span text:style-name="T211"> par exemple. </text:span><text:span text:style-name="T212">Ils contiennent les date et position pour chaque seconde. L’altitude GPS qui est fausse a 50m près souvent, </text:span><text:span text:style-name="T213">c’est pour cela que je ne la met plus</text:span><text:span text:style-name="T212">. </text:span><text:span text:style-name="T214">Il contient aussi </text:span><text:span text:style-name="T212">l’altitude barométrique </text:span><text:span text:style-name="T215">qui est </text:span><text:span text:style-name="T212">recalée </text:span><text:span text:style-name="T216">altitude sol</text:span><text:span text:style-name="T212"> </text:span><text:span text:style-name="T217">pendant la phase S stabilisation (il est donc important de laisser le vario au sol pendant cette phase)</text:span><text:span text:style-name="T212">. Cette dernière est assez précise </text:span><text:span text:style-name="T215">(10cm normalement) </text:span><text:span text:style-name="T212">pour peut que l’on ai laissé le GPS immobile pendant </text:span><text:span text:style-name="T218">la phase S,</text:span><text:span text:style-name="T212"> le temps qu’il se cale bien </text:span><text:span text:style-name="T217">en lat/lon pour extraire la bonne altitude des fichier *.hgt</text:span><text:span text:style-name="T212">. On a alors un fichier IGC précis à quelques mètres. </text:span><text:span text:style-name="T213">Que l’on peut convertir en kml avec </text:span><text:a xlink:type="simple" xlink:href="http://meles.work/igc/igc.html" text:style-name="Internet_20_link" text:visited-style-name="Visited_20_Internet_20_Link"><text:span text:style-name="T29">http://meles.work/igc/igc.html</text:span></text:a><text:span text:style-name="T29">.</text:span></text:p>
      <text:p text:style-name="P111"/>
      <text:h text:style-name="P112" text:outline-level="1"><text:bookmark-start text:name="__RefHeading___Toc4278_2919898572"/><text:span text:style-name="T188">Carte SD </text:span>:<text:bookmark-end text:name="__RefHeading___Toc4278_2919898572"/></text:h>
      <text:p text:style-name="P113">La carte SD doit etre formaté en fat16/fat32 les fichiers “/<text:span text:style-name="T28">config/</text:span>terconnu.txt”, “/<text:span text:style-name="T28">config/</text:span>config.txt”, <text:s/>“/<text:span text:style-name="T28">config/</text:span>calmag.txt”, <text:span text:style-name="T219"><text:s/>“/config/zonesaer.txt”, “/config/zones</text:span><text:span text:style-name="T220">act</text:span><text:span text:style-name="T219">.txt” </text:span><text:span text:style-name="T220">et </text:span><text:span text:style-name="T219">“/config/zones</text:span><text:span text:style-name="T220">per</text:span><text:span text:style-name="T219">.txt”</text:span>. <text:span text:style-name="T221">E</text:span><text:span text:style-name="T197">t le</text:span><text:span text:style-name="T179">s</text:span><text:span text:style-name="T197"> fichier</text:span><text:span text:style-name="T179">s</text:span><text:span text:style-name="T197"> genere</text:span><text:span text:style-name="T179">s</text:span><text:span text:style-name="T197"> “/</text:span><text:span text:style-name="T28">config/</text:span><text:span text:style-name="T197">calmag.txt” </text:span><text:span text:style-name="T179">et </text:span><text:span text:style-name="T197">“/</text:span><text:span text:style-name="T222">histo</text:span><text:span text:style-name="T28">/</text:span><text:span text:style-name="T222">nom_igc</text:span><text:span text:style-name="T197">.</text:span><text:span text:style-name="T222">his</text:span><text:span text:style-name="T197">”. </text:span>Les fichiers *.IGC sont créées à la racine.</text:p>
      <text:p text:style-name="P114">Elle contient aussi les fichiers de validation de zone<text:span text:style-name="T223"> “/valid/zonvalin.txt” et le fichier généré au boot wifi “/valid/zonvalout.txt”.</text:span></text:p>
      <text:p text:style-name="P115"><text:span text:style-name="T224">Important :</text:span><text:span text:style-name="T225"> Pensez a installer aussi les fichier de hauteur sol *.hgt, pour toute la france, dans le repertoire </text:span><text:span text:style-name="T226">"/config/hgtdata"</text:span><text:span text:style-name="T225">. </text:span><text:span text:style-name="T227">Ceci est obligatoire car il y a recalage d’altitude barométrique avec ces fichiers avant le decollage </text:span><text:span text:style-name="T228">( </text:span><text:a xlink:type="simple" xlink:href="https://www.viewfinderpanoramas.org/Coverage%20map%20viewfinderpanoramas_org3.htm" text:style-name="Internet_20_link" text:visited-style-name="Visited_20_Internet_20_Link"><text:span text:style-name="T29">https://www.viewfinderpanoramas.org/Coverage%20map%20viewfinderpanoramas_org3.htm</text:span></text:a><text:span text:style-name="T228"> ).</text:span></text:p>
      <text:p text:style-name="P116"/>
      <text:p text:style-name="P116"><text:soft-page-break/></text:p>
      <text:h text:style-name="P112" text:outline-level="1"><text:bookmark-start text:name="__RefHeading___Toc4280_2919898572"/><text:span text:style-name="T188">Rechargement du GnuVario</text:span> :<text:bookmark-end text:name="__RefHeading___Toc4280_2919898572"/></text:h>
      <text:p text:style-name="P117">Utiliser un cable micro-usb. Une recharge complète prend plusieurs heures. La tension de la batterie doit être <text:span text:style-name="T229">à</text:span> <text:span text:style-name="T229">4,</text:span><text:span text:style-name="T230">3</text:span>v en pleine charge (3,7<text:span text:style-name="T231">v</text:span> déchargée). La tension de la batterie est affichée a l’écran de boot ou en page <text:span text:style-name="T232">sys, </text:span><text:span text:style-name="T233">ainsi que en page Vz par le train en gras au dessus du temps de vol</text:span>.</text:p>
      <text:h text:style-name="P112" text:outline-level="1"><text:bookmark-start text:name="__RefHeading___Toc4282_2919898572"/><text:span text:style-name="T188">Le Gps</text:span> :<text:bookmark-end text:name="__RefHeading___Toc4282_2919898572"/></text:h>
      <text:p text:style-name="P117">Bien entendu le Gps accroche mieux en pleine nature qu’en ville, <text:span text:style-name="T210">en terrain découvert que sous les arbres</text:span>, par ciel clair que pluvieux, <text:span text:style-name="T234">à l’arrêt qu’en déplacement</text:span>. Attendre l’affichage d’une altitude cohérente à l’écran avant de faire le vol (<text:span text:style-name="T234">re</text:span>calage altitude barométrique <text:span text:style-name="T79">par altitude sol</text:span> <text:span text:style-name="T235">jusqu’</text:span><text:span text:style-name="T236">à la stabilisation gps)</text:span>.</text:p>
      <text:h text:style-name="P118" text:outline-level="1"><text:bookmark-start text:name="__RefHeading___Toc4284_2919898572"/><text:span text:style-name="T188">Le</text:span><text:span text:style-name="T237">s zones aériennes</text:span> <text:span text:style-name="T237">et le fichier SDCard/config/zonesaer.txt </text:span>:<text:bookmark-end text:name="__RefHeading___Toc4284_2919898572"/></text:h>
      <text:p text:style-name="P119">Les zones aériennes qui sont <text:span text:style-name="T100">traversées</text:span> sont affichées en lieux et place de “terrain connu accessible”. Si l’on traverse une zone aérienne, il y a affichage du nom de la zone ainsi <text:span text:style-name="T100">de </text:span>que sont altitude minimale <text:span text:style-name="T100">avec une alarme sonore </text:span>(<text:span text:style-name="T238">l’altitude est fonction de la zone, de la date en ou hors périodes, et de la semaine ou du week-end dans la période</text:span>). <text:span text:style-name="T100">L’alarme sonore est activable/désactivable par le bouton du milieu.</text:span></text:p>
      <text:p text:style-name="P120"><text:span text:style-name="T239">Peut de zones tiennent en mémoire du GnuVario. Donc, pour ce faire, il faut prendre le fichier </text:span><text:span text:style-name="T29">PlatformIO/Projects/CompZoneAerienne/data/202</text:span><text:span text:style-name="T240">40615</text:span><text:span text:style-name="T29">_ffvl-cfd.geojson </text:span><text:span text:style-name="T239">(disponible sur le net, </text:span><text:span text:style-name="T215">fichier generer par “Pascal Bazile” </text:span><text:a xlink:type="simple" xlink:href="http://pascal.bazile.free.fr/paraglidingFolder/divers/GPS/OpenAir-Format/download.php?file=files/20231230_ffvl-cfd.geojson" text:style-name="Internet_20_link" text:visited-style-name="Visited_20_Internet_20_Link"><text:span text:style-name="T215">http://pascal.bazile.free.fr/paraglidingFolder/divers/GPS/OpenAir-Format/download.php?file=files/202</text:span><text:span text:style-name="T241">40615</text:span><text:span text:style-name="T215">_ffvl-cfd.geojson</text:span></text:a><text:span text:style-name="T215"> </text:span><text:span text:style-name="T239">) et le découper avec le programme PlatformIO/Projects/CompZoneAerienne/CompZoneAerienne </text:span><text:span text:style-name="T242">qui compresse les zones à fort nombre de points (</text:span><text:span text:style-name="T243">itération 3 points distance à la </text:span><text:span text:style-name="T242">droite &lt; </text:span><text:span text:style-name="T243">4,5 mètres) </text:span><text:span text:style-name="T242">.</text:span><text:span text:style-name="T239">. </text:span></text:p>
      <text:p text:style-name="P121"><text:span text:style-name="T237">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244">coupant</text:span><text:span text:style-name="T237"> le</text:span><text:span text:style-name="T245">s</text:span><text:span text:style-name="T237"> cercle</text:span><text:span text:style-name="T245">s</text:span><text:span text:style-name="T237"> définit par </text:span><text:span text:style-name="T245">leur</text:span><text:span text:style-name="T237"> centre</text:span><text:span text:style-name="T245">s</text:span><text:span text:style-name="T237"> et rayon</text:span><text:span text:style-name="T245">s </text:span><text:span text:style-name="T246">des points connus</text:span><text:span text:style-name="T237">. Il suffit de placer ce fichier sur la carte SD/config.</text:span></text:p>
      <text:p text:style-name="P122"/>
      <text:p text:style-name="P123"><text:span text:style-name="T237">Attention :</text:span><text:span text:style-name="T247"> </text:span><text:span text:style-name="T248">S</text:span><text:span text:style-name="T247">i le fichier est trop gros, il plante le GnuVario au boot lors de sa lecture. C’est pour cela qu’il y a des zones réduites </text:span><text:span text:style-name="T249">en </text:span><text:span text:style-name="T247">nombre de points </text:span><text:span text:style-name="T249">par </text:span><text:span text:style-name="T250">CompZoneAerienne, </text:span><text:span text:style-name="T249">Ceci est fait lors de la génération du fichier.</text:span><text:span text:style-name="T251"> </text:span><text:span text:style-name="T248">C</text:span><text:span text:style-name="T251">omme </text:span><text:span text:style-name="T248">pour </text:span><text:span text:style-name="T251">les z</text:span><text:span text:style-name="T247">ones protégées “PROTECT” qui ont un énorme nombre de </text:span><text:soft-page-break/><text:span text:style-name="T247">points de définition </text:span><text:span text:style-name="T251">(1800 </text:span><text:span text:style-name="T249">pour Chaudefour</text:span><text:span text:style-name="T251">)</text:span><text:span text:style-name="T248">(Validation Gnuplot </text:span><text:span text:style-name="T252">très </text:span><text:span text:style-name="T248">acceptable). </text:span><text:span text:style-name="T249">L’algorithme utilisé est la suppression des points proches d’une droite.</text:span></text:p>
      <text:p text:style-name="P124">De plus, pour gagner en mémoire il y a un algorithme de compression de données de float 32bits vers short 16bits <text:span text:style-name="T253">dans le firmware</text:span>. Les zones ont ainsi une résolution variable de 1 à 7 mètres <text:span text:style-name="T253">par rapport aux</text:span> zones du fichier. En moyenne la résolution est de 1,95metres. Si il y a un problème de compression short il y a beep et reboot.</text:p>
      <text:p text:style-name="P125"><text:span text:style-name="T254"/></text:p>
      <text:p text:style-name="P126"><text:span text:style-name="T255">Remarque :</text:span><text:span text:style-name="T256"> Les fichiers *.hgt nécessaire au calcul de la hauteur sol sont a mettre dans le répertoire “SdCard/</text:span><text:span text:style-name="T257">config/h</text:span><text:span text:style-name="T256">gt</text:span><text:span text:style-name="T257">d</text:span><text:span text:style-name="T256">ata” (à t</text:span><text:span text:style-name="T258">é</text:span><text:span text:style-name="T256">lécharger sur </text:span><text:a xlink:type="simple" xlink:href="https://www.viewfinderpanoramas.org/Coverage%20map%20viewfinderpanoramas_org3.htm" text:style-name="Internet_20_link" text:visited-style-name="Visited_20_Internet_20_Link"><text:span text:style-name="T255">https://www.viewfinderpanoramas.org/Coverage%20map%20viewfinderpanoramas_org3.htm</text:span></text:a><text:span text:style-name="T256">). </text:span><text:span text:style-name="T259">Il y a test de présence au démarrage du centre de la France.</text:span></text:p>
      <text:p text:style-name="P127"><text:span text:style-name="T260"/></text:p>
      <text:p text:style-name="P127"><text:span text:style-name="T260">Important </text:span><text:span text:style-name="T261">:</text:span><text:span text:style-name="T247"> </text:span><text:span text:style-name="T262">Le GnuVario a été activement teste pour différent sites d‘Auvergne, a différentes périodes, altitudes et marges XY Z. Je </text:span><text:span text:style-name="T263">décline toutes responsabilité</text:span><text:span text:style-name="T262"> quand à sa fiabilité </text:span><text:span text:style-name="T264">à</text:span><text:span text:style-name="T262"> ce sujet (on est jamais </text:span><text:span text:style-name="T264">à</text:span><text:span text:style-name="T262"> l’abri d’un oubli dans l’algo</text:span><text:span text:style-name="T265">r</text:span><text:span text:style-name="T266">i</text:span><text:span text:style-name="T262">thme), en Auvergne et encore moins dans une autre région. Les zones étant bien imbriquées, vérifier par procédure de test, </text:span><text:span text:style-name="T267">au moins un point par zone,</text:span><text:span text:style-name="T262"> que le comportement est correct chez vous. </text:span><text:span text:style-name="T267">Pour cela il y a 2 fa</text:span><text:span text:style-name="T268">ç</text:span><text:span text:style-name="T267">ons :</text:span></text:p>
      <text:p text:style-name="P127"><text:span text:style-name="T267"><text:tab/>-</text:span><text:span text:style-name="T262"> </text:span><text:span text:style-name="T268">Rappel : d</text:span><text:span text:style-name="T262">ans la page “histo ecran 1”, </text:span><text:span text:style-name="T268">la zone et </text:span><text:span text:style-name="T262">le plafond courant </text:span><text:span text:style-name="T268">sont</text:span><text:span text:style-name="T262"> affiché</text:span><text:span text:style-name="T268">s</text:span><text:span text:style-name="T262">.</text:span></text:p>
      <text:p text:style-name="P127"><text:span text:style-name="T262"><text:tab/>- </text:span><text:span text:style-name="T268">U</text:span><text:span text:style-name="T267">tiliser le fichier </text:span><text:span text:style-name="T269">/valid/zonevalin.txt de la carte Sd. Puis booter en wifi. Il y a alors g</text:span><text:span text:style-name="T270">é</text:span><text:span text:style-name="T269">nération <text:tab/>de /valid/zonevalou.txt avec les résultats.</text:span></text:p>
      <text:p text:style-name="P128"><text:tab/>Zonevalin.txt est de la forme : </text:p>
      <text:p text:style-name="P128"><text:tab/><text:tab/>#ville;lon,lat;annee,mois,jour;altitude,marge_xy,marge_z;zone a_active,zone_b_active;</text:p>
      <text:p text:style-name="P128"><text:tab/>Zonevalou.txt est de la forme : </text:p>
      <text:p text:style-name="P129"><text:span text:style-name="T271"><text:tab/><text:tab/>numéro_ligne;ville;date;TMA;altitude_plafond;alarme_généré</text:span><text:span text:style-name="T272">e</text:span><text:span text:style-name="T271">;</text:span></text:p>
      <text:p text:style-name="P129"><draw:frame draw:style-name="fr2" draw:name="Image11" text:anchor-type="char" svg:x="-0.799cm" svg:y="0.016cm" svg:width="19.286cm" svg:height="5.694cm" draw:z-index="26"><draw:image xlink:href="Pictures/10000000000002D8000000D73A72951C.png" xlink:type="simple" xlink:show="embed" xlink:actuate="onLoad" draw:mime-type="image/png"/></draw:frame><text:span text:style-name="T271"/></text:p>
      <text:p text:style-name="P130"><text:soft-page-break/>Remarque :</text:p>
      <text:p text:style-name="Text_20_body"><text:tab/><text:span text:style-name="T233">Voir le logiciel CompZoneAerienne/zones_gnuplot et zones_kml pour avoir le dessin des zones. Sous forme de fichier *.png ou *.kml pour google earth.</text:span></text:p>
      <text:h text:style-name="P131" text:outline-level="1"><text:bookmark-start text:name="__RefHeading___Toc4286_2919898572"/><text:span text:style-name="T273">Pour les développeur </text:span>:<text:bookmark-end text:name="__RefHeading___Toc4286_2919898572"/></text:h>
      <text:p text:style-name="P132"><text:span text:style-name="T274">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274">https://prunkdump.github.io/GNUVario-TTGO-T5-website/code/ide_platformio.html</text:span></text:a><text:span text:style-name="T274"> </text:span><text:span text:style-name="T275">(avec plateforme IO </text:span><text:span text:style-name="T276">et board espressif ESP32 Dev module</text:span><text:span text:style-name="T275">). </text:span></text:p>
      <text:p text:style-name="P132"><text:span text:style-name="T275">Copier </text:span><text:span text:style-name="T277">les dossiers</text:span><text:span text:style-name="T275"> </text:span><text:span text:style-name="T277">de </text:span><text:a xlink:type="simple" xlink:href="https://github.com/gitberthe/BertheVario" text:style-name="Internet_20_link" text:visited-style-name="Visited_20_Internet_20_Link"><text:span text:style-name="T277">https://github.com/gitberthe/BertheVari</text:span><text:span text:style-name="T278">o213</text:span></text:a><text:span text:style-name="T277"> </text:span><text:span text:style-name="T275">dans ~/Documents/PlatformIO/</text:span><text:span text:style-name="T277">Projets</text:span><text:span text:style-name="T275">. </text:span></text:p>
      <text:p text:style-name="P133"><text:span text:style-name="T279">Ouvrir le projet BertheVario</text:span><text:span text:style-name="T236">213</text:span><text:span text:style-name="T280">PlatformIO</text:span><text:span text:style-name="T279">. Modifier les fichiers désirer, et en particulier les // commentaires dans les fichier BertheVario</text:span><text:span text:style-name="T236">213</text:span><text:span text:style-name="T280">PlatformIO</text:span><text:span text:style-name="T281">/</text:span><text:span text:style-name="T282">src/BertheVario</text:span><text:span text:style-name="T283">213</text:span><text:span text:style-name="T282">.h et ses différents #define DEBUG_XYZ</text:span><text:span text:style-name="T284">.</text:span></text:p>
      <text:p text:style-name="P134"><text:span text:style-name="T284">Puis compiler/uploader le firmware (petite </text:span><text:span text:style-name="T285">fleche en bas </text:span><text:span text:style-name="T286">à</text:span><text:span text:style-name="T285"> gauche de VSCode</text:span><text:span text:style-name="T284">, port /dev/ttyACM0 sous linux) de préférence sans la carte SD. </text:span><text:span text:style-name="T287">Ca reboot automatiquement le </text:span><text:span text:style-name="T283">Berthe</text:span><text:span text:style-name="T287">Vario</text:span><text:span text:style-name="T283">213</text:span><text:span text:style-name="T287">. </text:span></text:p>
      <text:p text:style-name="P135">Débogage par “Moniteur Serie”.</text:p>
      <text:p text:style-name="P136"><text:span text:style-name="T260">I</text:span><text:span text:style-name="T288">mportant</text:span><text:span text:style-name="T289"> :</text:span><text:span text:style-name="T279"> </text:span><text:span text:style-name="T290">attention si vous réinstallé </text:span><text:span text:style-name="T233">VsCode</text:span><text:span text:style-name="T290"> </text:span><text:span text:style-name="T291">(apparemment avec github et pull)</text:span><text:span text:style-name="T290">: </text:span></text:p>
      <text:p text:style-name="P136">- modifier "BertheVario<text:span text:style-name="T236">213</text:span><text:span text:style-name="T292">PlatformIO</text:span>/.pio/libdeps/esp32dev/ESP32 File Manager for Generation Klick <text:tab/>ESPFMfGK/src/ESPFMfGKGa.cpp" ligne 6 : <text:span text:style-name="T291">#include &lt;crc32.h&gt; en &lt;CRC32.h&gt;.</text:span></text:p>
      <text:p text:style-name="P137">Rappel :<text:span text:style-name="T132"> Pour ceux qui veulent recompiler CompZoneAerienne et ainsi générer leur propre zone</text:span><text:span text:style-name="T293">s,</text:span><text:span text:style-name="T132"> </text:span><text:span text:style-name="T294">le faire sous codeblocks, </text:span><text:span text:style-name="T295">aussi bien sous windows que sous liux</text:span><text:span text:style-name="T294">.</text:span></text:p>
      <text:p text:style-name="P138">Pour windows voir le programme et ses .dll déjà compilées dans le dépôt https://github.com/gitberthe/BertheVario<text:span text:style-name="T233">213</text:span></text:p>
      <text:p text:style-name="P111"/>
      <text:p text:style-name="P111"/>
      <text:h text:style-name="P139" text:outline-level="1"><text:bookmark-start text:name="__RefHeading___Toc4286_2919898572 Copie 1"/><text:span text:style-name="T296">Le mode randonnée pour ne plus se perdre</text:span><text:span text:style-name="T273"> </text:span>:<text:bookmark-end text:name="__RefHeading___Toc4286_2919898572 Copie 1"/></text:h>
      <text:p text:style-name="P140"><draw:line text:anchor-type="paragraph" draw:z-index="38" draw:name="Ligne 25" draw:style-name="gr2" draw:text-style-name="P34" svg:x1="8.218cm" svg:y1="14.917cm" svg:x2="7.232cm" svg:y2="20.306cm"><text:p/></draw:line><draw:line text:anchor-type="paragraph" draw:z-index="37" draw:name="Ligne 24" draw:style-name="gr2" draw:text-style-name="P34" svg:x1="9.827cm" svg:y1="14.487cm" svg:x2="16.156cm" svg:y2="15.808cm"><text:p/></draw:line><draw:line text:anchor-type="paragraph" draw:z-index="36" draw:name="Ligne 23" draw:style-name="gr2" draw:text-style-name="P34" svg:x1="9.227cm" svg:y1="11.864cm" svg:x2="15.722cm" svg:y2="8.761cm"><text:p/></draw:line><draw:line text:anchor-type="paragraph" draw:z-index="35" draw:name="Ligne 22" draw:style-name="gr2" draw:text-style-name="P34" svg:x1="7.352cm" svg:y1="10.925cm" svg:x2="1.868cm" svg:y2="10.71cm"><text:p/></draw:line><draw:line text:anchor-type="paragraph" draw:z-index="34" draw:name="Ligne 21" draw:style-name="gr2" draw:text-style-name="P34" svg:x1="7.063cm" svg:y1="8.712cm" svg:x2="2.757cm" svg:y2="5.071cm"><text:p/></draw:line><draw:line text:anchor-type="paragraph" draw:z-index="40" draw:name="Ligne 17" draw:style-name="gr2" draw:text-style-name="P34" svg:x1="8.842cm" svg:y1="10.973cm" svg:x2="14.568cm" svg:y2="1.328cm"><text:p/></draw:line><draw:line text:anchor-type="paragraph" draw:z-index="42" draw:name="Ligne 26" draw:style-name="gr2" draw:text-style-name="P34" svg:x1="8.218cm" svg:y1="11.742cm" svg:x2="1.314cm" svg:y2="12.368cm"><text:p/></draw:line><draw:frame text:anchor-type="paragraph" draw:z-index="33" draw:name="Cadre de texte 24" draw:style-name="gr8" draw:text-style-name="P141" svg:width="2.029cm" svg:height="1.031cm" svg:x="16.039cm" svg:y="7.703cm"><draw:text-box><text:p>Trace du fichier Gpx</text:p></draw:text-box></draw:frame><draw:frame text:anchor-type="paragraph" draw:z-index="32" draw:name="Cadre de texte 23" draw:style-name="gr8" draw:text-style-name="P141" svg:width="2.029cm" svg:height="1.031cm" svg:x="5.503cm" svg:y="20.523cm"><draw:text-box><text:p>Echelle de la carte</text:p></draw:text-box></draw:frame><draw:frame text:anchor-type="paragraph" draw:z-index="31" draw:name="Cadre de texte 22" draw:style-name="gr8" draw:text-style-name="P141" svg:width="3.77cm" svg:height="1.031cm" svg:x="-1.304cm" svg:y="4.577cm"><draw:text-box><text:p>Nom trace courante</text:p></draw:text-box></draw:frame><draw:frame text:anchor-type="paragraph" draw:z-index="30" draw:name="Cadre de texte 21" draw:style-name="gr8" draw:text-style-name="P141" svg:width="2.029cm" svg:height="1.031cm" svg:x="16.327cm" svg:y="15.498cm"><draw:text-box><text:p>Zoom + et -</text:p></draw:text-box></draw:frame><draw:frame text:anchor-type="paragraph" draw:z-index="29" draw:name="Cadre de texte 17" draw:style-name="gr8" draw:text-style-name="P141" svg:width="3.529cm" svg:height="1.031cm" svg:x="-1.277cm" svg:y="10.373cm"><draw:text-box><text:p>Nord magnetique</text:p></draw:text-box></draw:frame><draw:frame text:anchor-type="paragraph" draw:z-index="39" draw:name="Cadre de texte 25" draw:style-name="gr8" draw:text-style-name="P141" svg:width="3.529cm" svg:height="1.031cm" svg:x="14.019cm" svg:y="0.441cm"><draw:text-box><text:p>Cap Gps</text:p><text:p/></draw:text-box></draw:frame><draw:frame text:anchor-type="paragraph" draw:z-index="41" draw:name="Cadre de texte 26" draw:style-name="gr8" draw:text-style-name="P141" svg:width="3.529cm" svg:height="1.031cm" svg:x="-2.071cm" svg:y="12.169cm"><draw:text-box><text:p>Position courante</text:p></draw:text-box></draw:frame><draw:frame draw:style-name="fr2" draw:name="Image4" text:anchor-type="char" svg:x="2.076cm" svg:y="1.76cm" svg:width="13.476cm" svg:height="18.068cm" draw:z-index="0"><draw:image xlink:href="Pictures/10000000000001FC000002AA0AC9E4D4.png" xlink:type="simple" xlink:show="embed" xlink:actuate="onLoad" draw:mime-type="image/png"/></draw:frame><text:span text:style-name="T211"/></text:p>
      <text:p text:style-name="P142">Le mode randonnée est un mode de guidage terrestre pour rejoindre un décollage inconnu par exemple.</text:p>
      <text:p text:style-name="P143">Il est accessible au boot par l’appui sur le bouton droit (rappel : gauche calibration magnétique, centre filemanager wifi, gauche et droite reboot).</text:p>
      <text:p text:style-name="P143">Au démarrage, il y a acquisition du Gps. Puis une fois le Gps fonctionnant, il y a lecture des fichiers *.GPX du répertoire /SdCard/Gpx, <text:span text:style-name="T297">ainsi</text:span> <text:span text:style-name="T297">que du fichier des terrains connus </text:span><text:span text:style-name="T298">et d’un fichier similaire ptremarq.txt</text:span><text:span text:style-name="T297">. E</text:span><text:span text:style-name="T299">t affichage </text:span><text:span text:style-name="T300">quelques secondes des traces/</text:span><text:span text:style-name="T297">points</text:span><text:span text:style-name="T300"> l</text:span><text:span text:style-name="T299">es plus proches</text:span> <text:span text:style-name="T300">(rappel on peut télécharger les fichiers par wifi, drag&amp;drop).</text:span></text:p>
      <text:p text:style-name="P143">Suivant la position Gps, la trace/<text:span text:style-name="T297">point</text:span> gpx la plus proche est chargée en mémoire<text:span text:style-name="T301"> au bout de quelques secondes</text:span>. <text:span text:style-name="T302">On peut sélectionner une autre trace par les boutons gauche/droite/centre. </text:span>Le guidage <text:span text:style-name="T299">alors</text:span> commence.</text:p>
      <text:p text:style-name="P143">A l’écran on a :</text:p>
      <text:p text:style-name="P143">- Le nom de la trace du fichier gpx (8 caractères maximum + <text:span text:style-name="T299">3 pour</text:span> l’extension). Le nom <text:span text:style-name="T299">de la trace </text:span>est celui dans le fichier (la balise &lt;name&gt;) et peut être modifi<text:span text:style-name="T299">ée</text:span> avec un éditeur de texte standard.</text:p>
      <text:p text:style-name="P143">- <text:span text:style-name="T303">La grande ligne est </text:span>le nord magnétique issu du capteur magnétique (qui doit être calibré bien sur). Dans mon cas le haut du <text:span text:style-name="T20">Berthe</text:span>Vario<text:span text:style-name="T20">213</text:span> mais <text:span text:style-name="T304">ça</text:span> dépend de la compilation (fichier BerheVario<text:span text:style-name="T20">213</text:span>.h #define VARIO_CAP_MAG_A_PLAT <text:span text:style-name="T305">1 2 ou 3</text:span>).</text:p>
      <text:p text:style-name="P143">- <text:span text:style-name="T306">La trace gpx, orientée au nord, à l’échelle indiquée en mètres carrés pour la surface de l’écran.</text:span></text:p>
      <text:p text:style-name="P143">- <text:span text:style-name="T299">Les touches gauche/droite pour zoom fois 2, divisé par 2.</text:span></text:p>
      <text:p text:style-name="P143">- <text:span text:style-name="T299">le centre de l’écran est la position actuelle.</text:span></text:p>
      <text:p text:style-name="P143">- <text:span text:style-name="T303">La petite ligne est le cap gps.</text:span></text:p>
      <text:p text:style-name="P144">Donc en alignant le nord magnétique en haut de la carte on peut se situer par rapport à la trace. Le petit rond de la trace indique le début de <text:span text:style-name="T304">la </text:span>trace. Pour ma part c’est souvent l’atterrissage. </text:p>
      <text:p text:style-name="P145">On peut aussi mettre la ligne du cap gps en direction de la trace pour la rejoindre. Ou parallèle à la trace pour la suivre.</text:p>
      <text:p text:style-name="P146">D’autre part, avec le bouton centre, on affiche la page informations <text:span text:style-name="T53">pour quelques secondes</text:span>. Avec les distances/altitudes positive faites et restantes.</text:p>
      <text:p text:style-name="P147">On peut aussi orienter la carte au cap gps lors de la marche (boutons long G/D <text:span text:style-name="T307">ou double appui</text:span>).</text:p>
      <text:p text:style-name="P144">Je crée souvent les traces avec <text:a xlink:type="simple" xlink:href="https://www.visugpx.com/editgpx" text:style-name="Internet_20_link" text:visited-style-name="Visited_20_Internet_20_Link">https://www.visugpx.com/editgpx</text:a>.</text:p>
      <text:p text:style-name="P144"/>
      <text:p text:style-name="P148"/>
      <text:p text:style-name="P149">Boutons : </text:p>
      <text:p text:style-name="P150">Centre : <text:span text:style-name="T308">validation</text:span> trace <text:span text:style-name="T308">si menu. page info rando </text:span><text:span text:style-name="T309">si mode trace</text:span><text:span text:style-name="T308">.</text:span></text:p>
      <text:p text:style-name="P151">Centre long : <text:span text:style-name="T310">raz </text:span>écran<text:span text:style-name="T310">.</text:span></text:p>
      <text:p text:style-name="P151">Gauche/Droite : sélection trace si menu. Zoom+/-.</text:p>
      <text:p text:style-name="P152">Gauche/<text:span text:style-name="T308">Droite</text:span> <text:span text:style-name="T308">long </text:span>: cap nord/gps.</text:p>
      <text:p text:style-name="P149"><text:span text:style-name="T132"/></text:p>
      <text:p text:style-name="P149"><text:span text:style-name="T132"/></text:p>
      <text:p text:style-name="P144">A vos bâtons de marche...</text:p>
      <text:p text:style-name="P153">et</text:p>
      <text:p text:style-name="P111">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28</text:page-number><text:bookmark-end text:name="PageNumWizard_FOOTER_Style de page par défaut2"/><text:s/>/ <text:page-count>28</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7-01-01T14:28:30.863048091</meta:creation-date>
    <meta:generator>LibreOffice/26.2.3.2$Linux_X86_64 LibreOffice_project/620$Build-2</meta:generator>
    <meta:editing-cycles>0</meta:editing-cycles>
    <meta:editing-duration>P0D</meta:editing-duration>
    <meta:print-date>2025-02-09T17:03:07.543632554</meta:print-date>
    <meta:printed-by>Fichiers PDF</meta:printed-by>
    <meta:document-statistic meta:table-count="0" meta:image-count="13" meta:object-count="0" meta:page-count="28" meta:paragraph-count="230" meta:word-count="3938" meta:character-count="24372" meta:non-whitespace-character-count="20591"/>
  </office:meta>
</office:document-meta>
</file>